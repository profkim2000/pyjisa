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78000000438612C5FC6.png" manifest:media-type="image/png"/>
  <manifest:file-entry manifest:full-path="Pictures/10000001000001F4000001F465BF2785.png" manifest:media-type="image/png"/>
  <manifest:file-entry manifest:full-path="Pictures/10000001000000DC000000423394B809.png" manifest:media-type="image/png"/>
  <manifest:file-entry manifest:full-path="Pictures/10000001000006B7000000C95F735316.png" manifest:media-type="image/png"/>
  <manifest:file-entry manifest:full-path="Pictures/1000000100000292000002DE54CA68AC.png" manifest:media-type="image/png"/>
  <manifest:file-entry manifest:full-path="Pictures/10000001000005000000039C6BF75719.png" manifest:media-type="image/png"/>
  <manifest:file-entry manifest:full-path="Pictures/10000001000000FA000000FA656A77F9.png" manifest:media-type="image/png"/>
  <manifest:file-entry manifest:full-path="Pictures/TablePreview1.svm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ookieRun Bold" svg:font-family="'CookieRun Bold'" style:font-adornments="Regular" style:font-family-generic="modern" style:font-pitch="variable"/>
    <style:font-face style:name="CookieRun Bold1" svg:font-family="'CookieRun Bold'" style:font-family-generic="modern" style:font-pitch="variable"/>
    <style:font-face style:name="CookieRun Bold2" svg:font-family="'CookieRun Bold'"/>
    <style:font-face style:name="D2Coding" svg:font-family="D2Coding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modern" style:font-pitch="variable"/>
    <style:font-face style:name="나눔고딕 ExtraBold" svg:font-family="'나눔고딕 ExtraBold'" style:font-adornments="Bold" style:font-family-generic="modern" style:font-pitch="variable"/>
    <style:font-face style:name="나눔고딕 ExtraBold1" svg:font-family="'나눔고딕 ExtraBold'" style:font-family-generic="modern" style:font-pitch="variable"/>
    <style:font-face style:name="나눔고딕1" svg:font-family="나눔고딕" style:font-family-generic="roman" style:font-pitch="variable"/>
    <style:font-face style:name="나눔고딕2" svg:font-family="나눔고딕" style:font-adornments="Bold" style:font-pitch="variable"/>
    <style:font-face style:name="나눔고딕3" svg:font-family="나눔고딕" style:font-family-generic="system" style:font-pitch="variable"/>
    <style:font-face style:name="나눔고딕4" svg:font-family="나눔고딕" style:font-adornments="굵게" style:font-family-generic="modern" style:font-pitch="variable"/>
    <style:font-face style:name="맑은 고딕" svg:font-family="'맑은 고딕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dash" draw:stroke-dash="Long_20_Dash" svg:stroke-linecap="butt" draw:opacity="0%" draw:textarea-horizontal-align="justify" draw:textarea-vertical-align="middle" draw:auto-grow-height="false" fo:min-height="3.654cm" fo:min-width="5.237cm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Long_20_Dash" svg:stroke-linecap="butt" draw:opacity="0%" draw:textarea-horizontal-align="justify" draw:textarea-vertical-align="middle" draw:auto-grow-height="false" fo:min-height="3.654cm" fo:min-width="7.523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333333" draw:fill-color="#d0d0d0" draw:opacity="100%" draw:textarea-horizontal-align="justify" draw:textarea-vertical-align="middle" draw:auto-grow-height="false" fo:min-height="0.524cm" fo:min-width="3.508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333333" draw:fill-color="#d0d0d0" draw:opacity="100%" draw:textarea-horizontal-align="justify" draw:textarea-vertical-align="middle" draw:auto-grow-height="false" fo:min-height="0.524cm" fo:min-width="1.255cm" style:writing-mode="lr-tb" loext:decorative="false"/>
      <style:paragraph-properties style:writing-mode="lr-tb"/>
    </style:style>
    <style:style style:name="gr9" style:family="graphic" style:parent-style-name="standard">
      <style:graphic-properties draw:stroke="dash" draw:stroke-dash="Long_20_Dash" svg:stroke-linecap="butt" draw:opacity="0%" draw:textarea-horizontal-align="justify" draw:textarea-vertical-align="middle" draw:auto-grow-height="false" fo:min-height="3.654cm" fo:min-width="6.983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ash" svg:stroke-linecap="butt" draw:opacity="0%" draw:textarea-horizontal-align="justify" draw:textarea-vertical-align="middle" draw:auto-grow-height="false" fo:min-height="3.654cm" fo:min-width="8.63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333333" draw:fill-color="#d0d0d0" draw:opacity="100%" draw:textarea-horizontal-align="justify" draw:textarea-vertical-align="middle" draw:auto-grow-height="false" fo:min-height="0.524cm" fo:min-width="1.952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4c4c4c" draw:fill-color="#e8e8e8" draw:opacity="100%" draw:textarea-horizontal-align="justify" draw:textarea-vertical-align="middle" draw:auto-grow-height="false" fo:min-height="0.981cm" fo:min-width="3.299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opacity="0%" draw:textarea-horizontal-align="justify" draw:textarea-vertical-align="middle" draw:auto-grow-height="false" fo:min-height="0.749cm" fo:min-width="14.44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Long_20_Dash" svg:stroke-linecap="butt" draw:opacity="0%" draw:textarea-horizontal-align="justify" draw:textarea-vertical-align="middle" draw:auto-grow-height="false" fo:min-height="3.967cm" fo:min-width="20.50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dash" draw:stroke-dash="Long_20_Dash" svg:stroke-linecap="butt" draw:opacity="0%" draw:textarea-horizontal-align="justify" draw:textarea-vertical-align="middle" draw:auto-grow-height="false" fo:min-height="2.789cm" fo:min-width="20.503cm" style:writing-mode="lr-tb" loext:decorative="false"/>
      <style:paragraph-properties style:writing-mode="lr-tb"/>
    </style:style>
    <style:style style:name="gr16" style:family="graphic" style:parent-style-name="standard">
      <style:graphic-properties draw:opacity="0%" draw:textarea-horizontal-align="justify" draw:textarea-vertical-align="middle" draw:auto-grow-height="false" fo:min-height="0.641cm" fo:min-width="1.386cm" style:writing-mode="lr-tb" loext:decorative="false"/>
      <style:paragraph-properties style:writing-mode="lr-tb"/>
    </style:style>
    <style:style style:name="pr1" style:family="presentation" style:parent-style-name="기본값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기본값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기본값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기본값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기본값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기본값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단락_20_제목-title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단락_20_제목-outline1">
      <style:graphic-properties fo:min-height="0.5cm" loext:decorative="false"/>
      <style:paragraph-properties style:writing-mode="lr-tb"/>
    </style:style>
    <style:style style:name="pr9" style:family="presentation" style:parent-style-name="단락_20_제목-notes">
      <style:graphic-properties draw:fill-color="#ffffff" draw:auto-grow-height="false" fo:min-height="13.365cm" loext:decorative="false"/>
      <style:paragraph-properties style:writing-mode="lr-tb"/>
    </style:style>
    <style:style style:name="pr10" style:family="presentation" style:parent-style-name="msk_5f_기본값-title">
      <style:graphic-properties draw:auto-grow-height="true" fo:min-height="2.629cm" loext:decorative="false"/>
      <style:paragraph-properties style:writing-mode="lr-tb"/>
    </style:style>
    <style:style style:name="pr11" style:family="presentation" style:parent-style-name="msk_5f_기본값-outline1">
      <style:graphic-properties fo:min-height="0.5cm" loext:decorative="false"/>
      <style:paragraph-properties style:writing-mode="lr-tb"/>
    </style:style>
    <style:style style:name="pr12" style:family="presentation" style:parent-style-name="msk_5f_기본값-notes">
      <style:graphic-properties draw:fill-color="#ffffff" draw:auto-grow-height="false" fo:min-height="13.365cm" loext:decorative="false"/>
      <style:paragraph-properties style:writing-mode="lr-tb"/>
    </style:style>
    <style:style style:name="pr13" style:family="presentation" style:parent-style-name="msk_5f_기본값-title">
      <style:graphic-properties fo:min-height="2.629cm" loext:decorative="false"/>
      <style:paragraph-properties style:writing-mode="lr-tb"/>
    </style:style>
    <style:style style:name="pr14" style:family="presentation" style:parent-style-name="msk_5f_기본값-outline1">
      <style:graphic-properties fo:min-height="10.565cm" loext:decorative="false"/>
      <style:paragraph-properties style:writing-mode="lr-tb"/>
    </style:style>
    <style:style style:name="pr15" style:family="presentation" style:parent-style-name="단락_20_제목-title">
      <style:graphic-properties fo:min-height="2.629cm" loext:decorative="false"/>
      <style:paragraph-properties style:writing-mode="lr-tb"/>
    </style:style>
    <style:style style:name="pr16" style:family="presentation" style:parent-style-name="기본값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기본값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1.81cm" style:use-optimal-column-width="false"/>
    </style:style>
    <style:style style:name="co2" style:family="table-column">
      <style:table-column-properties style:column-width="11.811cm" style:use-optimal-column-width="false"/>
    </style:style>
    <style:style style:name="ro1" style:family="table-row">
      <style:table-row-properties style:row-height="2.06cm" style:use-optimal-row-height="false"/>
    </style:style>
    <style:style style:name="ro2" style:family="table-row">
      <style:table-row-properties style:row-height="4.868cm" style:use-optimal-row-height="false"/>
    </style:style>
    <style:style style:name="ce1" style:family="table-cell">
      <loext:graphic-properties draw:textarea-vertical-align="middle" fo:padding-top="0.5cm" fo:padding-bottom="0.5cm" fo:padding-left="0.5cm" fo:padding-right="0.5cm" style:writing-mode="lr-tb"/>
      <style:paragraph-properties fo:text-align="start" fo:border="0.28pt solid #000000" style:punctuation-wrap="hanging" loext:tab-stop-distance="2.54cm">
        <style:tab-stops/>
      </style:paragraph-properties>
      <style:text-properties fo:hyphenate="true"/>
    </style:style>
    <style:style style:name="ce2" style:family="table-cell">
      <loext:graphic-properties fo:padding-top="0.5cm" fo:padding-bottom="0.5cm" fo:padding-left="0.5cm" fo:padding-right="0.5cm"/>
      <style:paragraph-properties fo:border="0.28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50%" fo:text-align="center" fo:text-indent="0cm" style:punctuation-wrap="hanging" loext:tab-stop-distance="2.54cm" style:writing-mode="lr-tb">
        <style:tab-stops/>
      </style:paragraph-properties>
      <style:text-properties fo:hyphenate="true"/>
    </style:style>
    <style:style style:name="P3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loext:tab-stop-distance="2.54cm" style:font-independent-line-spacing="true">
        <style:tab-stops/>
      </style:paragraph-properties>
      <style:text-properties style:font-name="나눔고딕 ExtraBold1" fo:font-size="50pt" style:font-name-asian="나눔고딕 ExtraBold1" style:font-size-asian="50pt" style:font-size-complex="50pt" fo:hyphenate="tru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true"/>
    </style:style>
    <style:style style:name="P5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나눔고딕2" fo:font-size="24pt" fo:hyphenate="tru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50%" fo:text-align="start" fo:text-indent="0cm" style:punctuation-wrap="hanging" loext:tab-stop-distance="2.54cm" style:writing-mode="lr-tb">
        <style:tab-stops/>
      </style:paragraph-properties>
      <style:text-properties fo:hyphenate="true"/>
    </style:style>
    <style:style style:name="P8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54cm" style:font-independent-line-spacing="true">
        <style:tab-stops/>
      </style:paragraph-properties>
      <style:text-properties style:font-name="나눔고딕 ExtraBold1" fo:font-size="44pt" style:font-name-asian="나눔고딕 ExtraBold1" style:font-size-asian="44pt" style:font-size-complex="44pt" fo:hyphenate="true"/>
    </style:style>
    <style:style style:name="P9" style:family="paragraph">
      <style:paragraph-properties fo:margin-left="0cm" fo:margin-right="0cm" fo:margin-top="0cm" fo:margin-bottom="0cm" fo:line-height="1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true"/>
    </style:style>
    <style:style style:name="P10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나눔고딕2" fo:font-size="22pt" style:font-name-asian="나눔고딕2" style:font-size-asian="22pt" style:font-size-complex="22pt" fo:hyphenate="true"/>
    </style:style>
    <style:style style:name="P1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나눔고딕2" fo:font-size="21pt" style:font-name-asian="나눔고딕2" style:font-size-asian="21pt" style:font-size-complex="21pt" fo:hyphenate="true"/>
    </style:style>
    <style:style style:name="P12" style:family="paragraph">
      <style:paragraph-properties fo:margin-left="0cm" fo:margin-right="0cm" fo:margin-top="0.2cm" fo:margin-bottom="0cm" fo:line-height="115%" fo:text-align="start" fo:text-indent="0cm" style:punctuation-wrap="hanging" loext:tab-stop-distance="2.54cm" style:writing-mode="lr-tb">
        <style:tab-stops/>
      </style:paragraph-properties>
      <style:text-properties fo:hyphenate="true" loext:hyphenation-no-caps="false" loext:hyphenation-no-last-word="false"/>
    </style:style>
    <style:style style:name="P13" style:family="paragraph">
      <style:paragraph-properties fo:margin-left="0cm" fo:margin-right="0cm" fo:text-align="start" fo:text-indent="0cm" style:punctuation-wrap="hanging" loext:tab-stop-distance="2.54cm" style:writing-mode="lr-tb">
        <style:tab-stops/>
      </style:paragraph-properties>
    </style:style>
    <style:style style:name="P14" style:family="paragraph">
      <style:paragraph-properties fo:text-align="start" style:punctuation-wrap="hanging" loext:tab-stop-distance="2.54cm" style:writing-mode="lr-tb">
        <style:tab-stops/>
      </style:paragraph-properties>
      <style:text-properties fo:hyphenate="true"/>
    </style:style>
    <style:style style:name="P15" style:family="paragraph">
      <style:paragraph-properties fo:margin-left="0.3cm" fo:margin-right="0cm" fo:text-align="start" fo:text-indent="0cm"/>
      <style:text-properties style:font-name="D2Coding" fo:font-size="18pt"/>
    </style:style>
    <style:style style:name="P16" style:family="paragraph">
      <loext:graphic-properties draw:opacity="0%"/>
      <style:paragraph-properties fo:margin-left="0.3cm" fo:margin-right="0cm" fo:text-align="start" fo:text-indent="0cm" style:writing-mode="lr-tb"/>
      <style:text-properties style:font-name="D2Coding" fo:font-size="18pt"/>
    </style:style>
    <style:style style:name="P17" style:family="paragraph">
      <style:paragraph-properties fo:margin-left="0.3cm" fo:margin-right="0cm" fo:text-align="start" fo:text-indent="0cm"/>
      <style:text-properties fo:font-size="18pt"/>
    </style:style>
    <style:style style:name="P18" style:family="paragraph">
      <loext:graphic-properties draw:opacity="0%"/>
      <style:paragraph-properties fo:margin-left="0.3cm" fo:margin-right="0cm" fo:text-align="start" fo:text-indent="0cm" style:writing-mode="lr-tb"/>
      <style:text-properties fo:font-size="18pt"/>
    </style:style>
    <style:style style:name="P19" style:family="paragraph">
      <style:paragraph-properties fo:text-align="center"/>
      <style:text-properties fo:font-size="15pt" style:font-size-asian="15pt" style:font-size-complex="15pt"/>
    </style:style>
    <style:style style:name="P20" style:family="paragraph">
      <loext:graphic-properties draw:fill-color="#d0d0d0" draw:opacity="100%"/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style:paragraph-properties fo:margin-left="0.3cm" fo:margin-right="0cm" fo:text-align="start" fo:text-indent="0cm"/>
      <style:text-properties style:font-name="D2Coding" style:font-name-asian="D2Coding"/>
    </style:style>
    <style:style style:name="P22" style:family="paragraph">
      <loext:graphic-properties draw:opacity="0%"/>
      <style:paragraph-properties fo:margin-left="0.3cm" fo:margin-right="0cm" fo:text-align="start" fo:text-indent="0cm" style:writing-mode="lr-tb"/>
      <style:text-properties style:font-name="D2Coding" style:font-name-asian="D2Coding"/>
    </style:style>
    <style:style style:name="P23" style:family="paragraph">
      <style:paragraph-properties fo:text-align="center"/>
    </style:style>
    <style:style style:name="P24" style:family="paragraph">
      <loext:graphic-properties draw:fill-color="#e8e8e8" draw:opacity="100%"/>
      <style:paragraph-properties fo:text-align="center" style:writing-mode="lr-tb"/>
    </style:style>
    <style:style style:name="P25" style:family="paragraph">
      <style:paragraph-properties fo:text-align="start"/>
    </style:style>
    <style:style style:name="P26" style:family="paragraph">
      <loext:graphic-properties draw:opacity="0%"/>
      <style:paragraph-properties fo:text-align="start" style:writing-mode="lr-tb"/>
    </style:style>
    <style:style style:name="P27" style:family="paragraph">
      <style:paragraph-properties fo:margin-left="0.3cm" fo:margin-right="0cm" fo:text-align="start" fo:text-indent="0cm"/>
      <style:text-properties style:font-name="D2Coding"/>
    </style:style>
    <style:style style:name="P28" style:family="paragraph">
      <loext:graphic-properties draw:opacity="0%"/>
      <style:paragraph-properties fo:margin-left="0.3cm" fo:margin-right="0cm" fo:text-align="start" fo:text-indent="0cm" style:writing-mode="lr-tb"/>
      <style:text-properties style:font-name="D2Coding"/>
    </style:style>
    <style:style style:name="P29" style:family="paragraph">
      <style:paragraph-properties fo:margin-left="0.3cm" fo:margin-right="0cm" fo:line-height="150%" fo:text-align="start" fo:text-indent="0cm"/>
      <style:text-properties style:font-name="D2Coding"/>
    </style:style>
    <style:style style:name="P30" style:family="paragraph">
      <loext:graphic-properties draw:opacity="0%"/>
      <style:paragraph-properties fo:margin-left="0.3cm" fo:margin-right="0cm" fo:line-height="150%" fo:text-align="start" fo:text-indent="0cm" style:writing-mode="lr-tb"/>
      <style:text-properties style:font-name="D2Coding"/>
    </style:style>
    <style:style style:name="P31" style:family="paragraph">
      <loext:graphic-properties draw:opacity="0%"/>
      <style:paragraph-properties fo:text-align="center" style:writing-mode="lr-tb"/>
      <style:text-properties fo:font-size="15pt" style:font-size-asian="15pt" style:font-size-complex="15pt"/>
    </style:style>
    <style:style style:name="P32" style:family="paragraph">
      <style:paragraph-properties fo:margin-top="0.5cm" fo:margin-bottom="0cm" fo:line-height="115%"/>
      <style:text-properties fo:hyphenate="false" loext:hyphenation-no-caps="false" loext:hyphenation-no-last-word="false"/>
    </style:style>
    <style:style style:name="P3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true"/>
    </style:style>
    <style:style style:name="P3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5" style:family="paragraph">
      <style:paragraph-properties fo:margin-left="0cm" fo:margin-right="0cm" fo:margin-top="0.353cm" fo:margin-bottom="0cm" fo:line-height="1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true"/>
    </style:style>
    <style:style style:name="P36" style:family="paragraph">
      <loext:graphic-properties draw:fill="none"/>
      <style:paragraph-properties fo:text-align="start" style:font-independent-line-spacing="true"/>
      <style:text-properties style:font-name="나눔고딕2" fo:font-size="28pt" style:font-name-asian="나눔고딕2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나눔고딕 ExtraBold1" fo:font-size="60pt" fo:letter-spacing="normal" fo:language="en" fo:country="US" fo:font-style="normal" style:text-underline-style="none" fo:font-weight="bold" fo:background-color="transparent" style:font-name-asian="나눔고딕 ExtraBold1" style:font-size-asian="60pt" style:font-style-asian="normal" style:font-weight-asian="bold" style:font-size-complex="60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나눔고딕 ExtraBold1" fo:font-size="50pt" fo:letter-spacing="normal" fo:language="en" fo:country="US" fo:font-style="normal" style:text-underline-style="none" fo:font-weight="bold" fo:background-color="transparent" style:font-name-asian="나눔고딕 ExtraBold1" style:font-size-asian="50pt" style:font-style-asian="normal" style:font-weight-asian="bold" style:font-size-complex="50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나눔고딕 ExtraBold1" fo:font-size="50pt" fo:letter-spacing="normal" fo:language="en" fo:country="US" fo:font-style="normal" style:text-underline-style="none" fo:font-weight="bold" fo:background-color="transparent" style:font-name-asian="나눔고딕 ExtraBold1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나눔고딕2" fo:font-size="24pt" fo:letter-spacing="normal" fo:language="en" fo:country="US" fo:font-style="normal" style:text-underline-style="none" fo:font-weight="normal" fo:background-color="transparent" style:font-name-asian="맑은 고딕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나눔고딕 ExtraBold1" fo:font-size="44pt" fo:letter-spacing="normal" fo:language="en" fo:country="US" fo:font-style="normal" style:text-underline-style="none" fo:font-weight="bold" fo:background-color="transparent" style:font-name-asian="나눔고딕 ExtraBold1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나눔고딕" fo:font-size="22pt" fo:letter-spacing="normal" fo:language="en" fo:country="US" fo:font-style="normal" fo:text-shadow="none" style:text-underline-style="none" fo:font-weight="normal" style:letter-kerning="true" fo:background-color="transparent" style:font-name-asian="나눔고딕" style:font-size-asian="22pt" style:language-asian="ko" style:country-asian="KR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나눔고딕" fo:font-size="21pt" fo:letter-spacing="normal" fo:language="en" fo:country="US" fo:font-style="normal" fo:text-shadow="none" style:text-underline-style="none" fo:font-weight="bold" style:letter-kerning="true" fo:background-color="transparent" style:font-name-asian="나눔고딕" style:font-size-asian="21pt" style:language-asian="ko" style:country-asian="KR" style:font-style-asian="normal" style:font-weight-asian="bold" style:font-name-complex="Lucida Sans" style:font-size-complex="21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나눔고딕2" fo:font-size="26pt" fo:letter-spacing="normal" fo:language="en" fo:country="US" fo:font-style="normal" style:text-underline-style="none" fo:font-weight="bold" fo:background-color="transparent" style:font-name-asian="나눔고딕2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나눔고딕2" fo:font-size="24pt" fo:letter-spacing="normal" fo:language="en" fo:country="US" fo:font-style="normal" style:text-underline-style="none" fo:background-color="transparent" style:font-name-asian="나눔고딕2" style:font-size-asian="24pt" style:font-style-asian="normal" style:font-size-complex="24pt" style:font-style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나눔고딕2" fo:font-size="26pt" fo:letter-spacing="normal" fo:language="en" fo:country="US" fo:font-style="normal" style:text-underline-style="none" fo:font-weight="normal" fo:background-color="transparent" style:font-name-asian="나눔고딕2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style:font-name="D2Coding" fo:font-size="18pt"/>
    </style:style>
    <style:style style:name="T12" style:family="text">
      <style:text-properties fo:font-size="18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style:font-name="D2Coding" style:font-name-asian="D2Coding"/>
    </style:style>
    <style:style style:name="T15" style:family="text">
      <style:text-properties style:font-name="D2Coding"/>
    </style:style>
    <style:style style:name="T16" style:family="text">
      <style:text-properties fo:color="#c9211e" loext:opacity="100%" style:font-name="D2Coding" fo:font-weight="bold" style:font-weight-asian="bold" style:font-weight-complex="bold"/>
    </style:style>
    <style:style style:name="T17" style:family="text">
      <style:text-properties style:font-name="나눔고딕"/>
    </style:style>
    <style:style style:name="T18" style:family="text">
      <style:text-properties style:font-name="나눔고딕" style:font-name-asian="나눔고딕"/>
    </style:style>
    <style:style style:name="T19" style:family="text">
      <style:text-properties style:font-name="나눔고딕 ExtraBold1" style:font-name-asian="나눔고딕 ExtraBold1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okieRun Bold2" fo:font-size="44pt" fo:letter-spacing="normal" fo:language="en" fo:country="US" fo:font-style="normal" style:text-underline-style="none" fo:font-weight="normal" fo:background-color="transparent" style:font-name-asian="CookieRun Bold2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나눔고딕2" fo:font-size="20pt" fo:letter-spacing="normal" fo:language="en" fo:country="US" fo:font-style="normal" style:text-underline-style="none" fo:font-weight="normal" fo:background-color="transparent" style:font-name-asian="나눔고딕2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나눔고딕2" fo:font-size="20pt" fo:letter-spacing="normal" fo:language="en" fo:country="US" fo:font-style="normal" style:text-underline-style="none" fo:font-weight="normal" fo:background-color="transparent" style:font-name-asian="나눔고딕2" style:font-size-asian="20pt" style:language-asian="ko" style:country-asian="KR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▪">
        <style:list-level-properties text:space-before="0.3cm" text:min-label-width="0.75cm"/>
        <style:text-properties fo:font-family="OpenSymbol" style:font-charset="x-symbol" style:use-window-font-color="true" fo:font-size="100%"/>
      </text:list-level-style-bullet>
      <text:list-level-style-bullet text:level="2" text:bullet-char="–">
        <style:list-level-properties text:space-before="1.2cm" text:min-label-width="0.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cm" text:min-label-width="0.6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draw:style-name="gr1" draw:text-style-name="P1" draw:layer="layout" svg:width="28.002cm" svg:height="15.748cm" svg:x="-0.002cm" svg:y="0.002cm">
          <draw:image xlink:href="Pictures/100000000000078000000438612C5FC6.png" xlink:type="simple" xlink:show="embed" xlink:actuate="onLoad" draw:mime-type="image/png">
            <text:p/>
          </draw:image>
        </draw:frame>
        <draw:frame draw:name="제목 33" presentation:style-name="pr1" draw:text-style-name="P3" draw:layer="layout" svg:width="28.003cm" svg:height="7.023cm" svg:x="-0.028cm" svg:y="2.995cm" presentation:class="title" presentation:user-transformed="true">
          <draw:text-box>
            <text:p text:style-name="P2"><text:span text:style-name="T1">지사에서의 파이썬 활용</text:span><text:span text:style-name="T2"><text:line-break/></text:span><text:span text:style-name="T3">세종지사 </text:span><text:span text:style-name="T3">Power-UP day</text:span></text:p>
          </draw:text-box>
        </draw:frame>
        <draw:frame draw:name="부제목 3" draw:style-name="gr2" draw:text-style-name="P5" draw:layer="layout" svg:width="21.003cm" svg:height="1.085cm" svg:x="3.496cm" svg:y="11.415cm">
          <draw:text-box>
            <text:p text:style-name="P4"><text:span text:style-name="T4">2026</text:span></text:p>
          </draw:text-box>
        </draw:frame>
        <draw:frame draw:style-name="gr1" draw:text-style-name="P1" draw:layer="layout" svg:width="6.246cm" svg:height="0.73cm" svg:x="10.876cm" svg:y="13.672cm">
          <draw:image xlink:href="Pictures/10000001000006B7000000C95F7353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기본값">
        <office:forms form:automatic-focus="false" form:apply-design-mode="false"/>
        <draw:frame draw:style-name="gr1" draw:text-style-name="P1" draw:layer="layout" svg:width="27.996cm" svg:height="15.749cm" svg:x="0cm" svg:y="0cm">
          <draw:image xlink:href="Pictures/100000000000078000000438612C5FC6.png" xlink:type="simple" xlink:show="embed" xlink:actuate="onLoad" draw:mime-type="image/png">
            <text:p/>
          </draw:image>
        </draw:frame>
        <draw:frame draw:name="제목 3" presentation:style-name="pr3" draw:text-style-name="P8" draw:layer="layout" svg:width="17.32cm" svg:height="3.285cm" svg:x="6.904cm" svg:y="2.998cm" presentation:class="title" presentation:user-transformed="true">
          <draw:text-box>
            <text:p text:style-name="P7"><text:span text:style-name="T5">강사</text:span></text:p>
          </draw:text-box>
        </draw:frame>
        <draw:frame draw:name="내용 개체 틀 3" presentation:style-name="pr4" draw:text-style-name="P10" draw:layer="layout" svg:width="17.225cm" svg:height="7.156cm" svg:x="7.275cm" svg:y="5.87cm" presentation:class="outline" presentation:user-transformed="true">
          <draw:text-box>
            <text:p text:style-name="P9"><text:span text:style-name="T6">- Eugene Kim</text:span></text:p>
            <text:p text:style-name="P9"><text:span text:style-name="T6">- </text:span><text:span text:style-name="T6">국토정보교육원 인재개발실 전임강사</text:span></text:p>
            <text:p text:style-name="P9"><text:span text:style-name="T6">- blog: </text:span><text:span text:style-name="T6"><text:a xlink:href="https://profkim2000.github.io/blog" xlink:type="simple">https://profkim2000.github.io/blog</text:a></text:span></text:p>
          </draw:text-box>
        </draw:frame>
        <draw:frame draw:style-name="gr1" draw:text-style-name="P1" draw:layer="layout" svg:width="1.372cm" svg:height="1.53cm" svg:x="5.408cm" svg:y="4.47cm">
          <draw:image xlink:href="Pictures/1000000100000292000002DE54CA68AC.png" xlink:type="simple" xlink:show="embed" xlink:actuate="onLoad" draw:mime-type="image/png">
            <text:p/>
          </draw:image>
        </draw:frame>
        <draw:frame draw:style-name="gr1" draw:text-style-name="P1" draw:layer="layout" svg:width="2.48cm" svg:height="2.48cm" svg:x="7.854cm" svg:y="10.913cm">
          <draw:image xlink:href="Pictures/10000001000000FA000000FA656A77F9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aice.study/info/aice/asso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기본값">
        <office:forms form:automatic-focus="false" form:apply-design-mode="false"/>
        <draw:frame draw:style-name="gr1" draw:text-style-name="P1" draw:layer="layout" svg:width="27.996cm" svg:height="15.749cm" svg:x="0cm" svg:y="0cm">
          <draw:image xlink:href="Pictures/100000000000078000000438612C5FC6.png" xlink:type="simple" xlink:show="embed" xlink:actuate="onLoad" draw:mime-type="image/png">
            <text:p/>
          </draw:image>
        </draw:frame>
        <draw:frame draw:style-name="gr1" draw:text-style-name="P1" draw:layer="layout" svg:width="14.271cm" svg:height="10.302cm" svg:x="0.23cm" svg:y="0.388cm">
          <draw:image xlink:href="Pictures/10000001000005000000039C6BF75719.png" xlink:type="simple" xlink:show="embed" xlink:actuate="onLoad" draw:mime-type="image/png">
            <text:p/>
          </draw:image>
        </draw:frame>
        <draw:frame draw:name="제목 31" presentation:style-name="pr3" draw:text-style-name="P8" draw:layer="layout" svg:width="17.32cm" svg:height="3.285cm" svg:x="10.653cm" svg:y="5.188cm" presentation:class="title" presentation:user-transformed="true">
          <draw:text-box>
            <text:p text:style-name="P7"><text:span text:style-name="T5">Contents</text:span></text:p>
          </draw:text-box>
        </draw:frame>
        <draw:frame draw:name="내용 개체 틀 4" presentation:style-name="pr6" draw:text-style-name="P11" draw:layer="layout" svg:width="14.704cm" svg:height="7.156cm" svg:x="11.943cm" svg:y="8.126cm" presentation:class="outline" presentation:user-transformed="true">
          <draw:text-box>
            <text:p text:style-name="P9"><text:span text:style-name="T7">1. </text:span><text:span text:style-name="T7">파이썬 개요</text:span></text:p>
            <text:p text:style-name="P9"><text:span text:style-name="T7">2. </text:span><text:span text:style-name="T7">프로그래밍 이야기</text:span></text:p>
            <text:p text:style-name="P9"><text:span text:style-name="T7">3. </text:span><text:span text:style-name="T7">파이썬 기초</text:span></text:p>
            <text:p text:style-name="P9"><text:span text:style-name="T7">4. </text:span><text:span text:style-name="T7">기존 파이썬 프로그램 활용</text:span></text:p>
            <text:p text:style-name="P9"><text:span text:style-name="T7">5. </text:span><text:span text:style-name="T7">측량과 공간정보에 사용하는 파이썬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단락_20_제목" presentation:presentation-page-layout-name="AL2T1">
        <office:forms form:automatic-focus="false" form:apply-design-mode="false"/>
        <draw:frame presentation:style-name="pr7" draw:layer="layout" svg:width="25.199cm" svg:height="2.629cm" svg:x="1.4cm" svg:y="7.728cm" presentation:class="title" presentation:user-transformed="true">
          <draw:text-box>
            <text:p>파이썬 개요</text:p>
          </draw:text-box>
        </draw:frame>
        <draw:frame presentation:style-name="pr8" draw:layer="layout" svg:width="6cm" svg:height="0.75cm" svg:x="0cm" svg:y="1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sk_5f_기본값" presentation:presentation-page-layout-name="AL2T1">
        <office:forms form:automatic-focus="false" form:apply-design-mode="false"/>
        <draw:frame presentation:style-name="pr10" draw:layer="layout" svg:width="25.199cm" svg:height="2.629cm" svg:x="1.4cm" svg:y="0.628cm" presentation:class="title">
          <draw:text-box>
            <text:p>python(파이썬)</text:p>
          </draw:text-box>
        </draw:frame>
        <draw:frame presentation:style-name="pr11" draw:layer="layout" svg:width="25.199cm" svg:height="10.815cm" svg:x="1.4cm" svg:y="3.685cm" presentation:class="outline">
          <draw:text-box>
            <text:list text:style-name="L3">
              <text:list-item>
                <text:p>원래 뜻</text:p>
                <text:list>
                  <text:list-item>
                    <text:p>비단뱀</text:p>
                  </text:list-item>
                  <text:list-item>
                    <text:p>고대 신화에 나오는 큰 뱀</text:p>
                    <text:p/>
                  </text:list-item>
                </text:list>
              </text:list-item>
              <text:list-item>
                <text:p>프로그래밍 언어 이름에 python을 붙인 이유 </text:p>
                <text:list>
                  <text:list-item>
                    <text:p>python 제작자(귀도 반 로섬)이 좋아하는 코미디 Monty Python's Flying Circus에서 따온 이름. <text:s text:c="2"/>&lt;출처: 위키백과&gt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python(파이썬)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4">
              <text:list-item>
                <text:p text:style-name="P12"><text:span text:style-name="T8">로고</text:span></text:p>
                <text:list>
                  <text:list-header>
                    <text:p text:style-name="P13"><text:span text:style-name="T9"/></text:p>
                    <text:p text:style-name="P13"><text:span text:style-name="T9"/></text:p>
                  </text:list-header>
                  <text:list-item>
                    <text:p text:style-name="P13"><text:span text:style-name="T9">뱀 </text:span><text:span text:style-name="T9">2</text:span><text:span text:style-name="T9">마리가 얽혀 있는 형상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201cm" svg:height="2.759cm" svg:x="3.332cm" svg:y="5.258cm">
          <draw:image xlink:href="Pictures/10000001000000DC000000423394B8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사람들이 파이썬에 열광하는 이유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4">
              <text:list-item>
                <text:p text:style-name="P12"><text:span text:style-name="T8">쉽다</text:span></text:p>
                <text:list>
                  <text:list-item>
                    <text:p text:style-name="P13"><text:span text:style-name="T10">파이썬 자체가 쉽다기보다는 다른 프로그래밍 언어들에 비해서는 낫다</text:span></text:p>
                  </text:list-item>
                  <text:list-item>
                    <text:p text:style-name="P13"><text:span text:style-name="T10">개발에 필요한 많은 기능들이 준비되어 있다</text:span></text:p>
                    <text:list>
                      <text:list-item>
                        <text:p text:style-name="P13"><text:span text:style-name="T10">예</text:span><text:span text:style-name="T10">) PDF </text:span><text:span text:style-name="T10">파일을 읽어서 화면에 보여줄 필요가 있을 때 </text:span><text:span text:style-name="T10">PDF </text:span><text:span text:style-name="T10">기능을 직접 개발하는 것이 아닌</text:span><text:span text:style-name="T10">, </text:span><text:span text:style-name="T10">가져와서 쓰면 된다</text:span><text:span text:style-name="T10">.</text:span></text:p>
                      </text:list-item>
                      <text:list-item>
                        <text:p text:style-name="P13"><text:span text:style-name="T10">다른 사람들이 만든 기능을 쉽게 가져와 쓰는 환경이 잘 갖춰져 있다</text:span><text:span text:style-name="T10">.</text:span></text:p>
                      </text:list-item>
                    </text:list>
                  </text:list-item>
                  <text:list-item>
                    <text:p text:style-name="P13"><text:span text:style-name="T10">초보 수준에서 지식이 얕아도 다른 언어에 비해 많은 일을 할 수 있다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사람들이 파이썬에 열광하는 이유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4">
              <text:list-item>
                <text:p text:style-name="P12"><text:span text:style-name="T8">간결하다 </text:span></text:p>
                <text:list>
                  <text:list-header>
                    <text:p text:style-name="P13"><text:span text:style-name="T10"/></text:p>
                    <text:list>
                      <text:list-header>
                        <text:p text:style-name="P13"><text:span text:style-name="T10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4" draw:layer="layout" svg:width="23.62cm" svg:height="6.927cm" svg:x="2.179cm" svg:y="5.5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0">다른 언어</text:span><text:span text:style-name="T10">: C</text:span><text:span text:style-name="T10">언어</text:span></text:p>
              </table:table-cell>
              <table:table-cell>
                <text:p text:style-name="P14"><text:span text:style-name="T10">python</text:span></text:p>
              </table:table-cell>
            </table:table-row>
            <table:table-row table:style-name="ro2" table:default-cell-style-name="ce2">
              <table:table-cell>
                <text:p>int a = 10;</text:p>
                <text:p>int b = 20;</text:p>
                <text:p>int c = a + b;</text:p>
                <text:p>printf("c = %d", c);</text:p>
              </table:table-cell>
              <table:table-cell>
                <text:p>a = 10</text:p>
                <text:p>b = 20</text:p>
                <text:p>c = a + b</text:p>
                <text:p>print("c = ", c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사람들이 파이썬에 열광하는 이유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무수히 많은 참고 자료</text:p>
                <text:list>
                  <text:list-item>
                    <text:p>사용자 수가 많으니 참고 자료도 많다</text:p>
                    <text:list>
                      <text:list-item>
                        <text:p>책, blog, youtube 등</text:p>
                      </text:list-item>
                    </text:list>
                  </text:list-item>
                  <text:list-item>
                    <text:p>개발에 필요한 많은 기능들이 준비되어 있다</text:p>
                    <text:list>
                      <text:list-item>
                        <text:p>예) PDF 파일을 읽어서 화면에 보여줄 필요가 있을 때 PDF 기능을 가져와서 쓰면 된다.</text:p>
                      </text:list-item>
                      <text:list-item>
                        <text:p>다른 사람들이 만든 기능을 쉽게 가져와 쓰는 환경이 잘 갖춰져 있다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사람들이 파이썬에 열광하는 이유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무수히 많은 라이브러리</text:p>
                <text:list>
                  <text:list-item>
                    <text:p>라이브러리(library)</text:p>
                    <text:list>
                      <text:list-item>
                        <text:p>어떤 기능을 만들어 미리 놓은 것</text:p>
                      </text:list-item>
                      <text:list-item>
                        <text:p>예) PDF 라이브러리: PDF 편집 프로그램 만들 때 사용</text:p>
                      </text:list-item>
                      <text:list-item>
                        <text:p>예) 엑셀 라이브러리: 엑셀 편집 프로그램 만들 때 사용</text:p>
                      </text:list-item>
                      <text:list-item>
                        <text:p>예) 이미지 라이브러리: 반지름이 4cm인 원을 그릴 때 사용</text:p>
                      </text:list-item>
                    </text:list>
                  </text:list-item>
                  <text:list-item>
                    <text:p>필요한 기능 웬만한 건 이미 라이브러리로 개발되어 있더라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사람들이 파이썬에 열광하는 이유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AI, 빅데이터 분석용 라이브러리가 대거 공개되어 있다.</text:p>
                <text:list>
                  <text:list-item>
                    <text:p>파이썬 자체가 AI, 빅데이터 분석에 특화되어 있다기 보다는 <text:line-break/>언어 자체가 쉬우니 초보자들이 많이 사용하고 있고, <text:line-break/>그래서 라이브러리를 파이썬 버전으로 많이 만들어 공개함.</text:p>
                  </text:list-item>
                  <text:list-item>
                    <text:p>많은 수의 사용자들이 더 많은 라이브러리들을 만들어 공개하고 <text:line-break/>그에 따라 사용자가 더 늘어나는 선순환이 이루어지고 있는 상태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사람들이 파이썬에 열광하는 이유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설치와 사용이 쉽다</text:p>
                <text:list>
                  <text:list-item>
                    <text:p>무료</text:p>
                  </text:list-item>
                  <text:list-item>
                    <text:p>python 설치 프로그램 크기가 작아 금방 설치하고 바로 사용할 수 있다.</text:p>
                    <text:list>
                      <text:list-item>
                        <text:p>java는 설치 후 환경설정을 해야 한다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python으로 할 수 있는 것들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웹사이트</text:p>
                <text:list>
                  <text:list-item>
                    <text:p>내 컴퓨터가 웹서버가 된다.</text:p>
                  </text:list-item>
                  <text:list-item>
                    <text:p>내가 만든 웹사이트에, 내 친구가 웹브라우저로 접속해서, 파일을 업로드하거나 다운로드하게 개발할 수 있다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python으로 할 수 있는 것들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AI</text:p>
                <text:list>
                  <text:list-item>
                    <text:p>많은 AI 라이브러리들이 python을 사용해 개발되어 AI를 하려면 python을 배워야 할 정도</text:p>
                    <text:list>
                      <text:list-item>
                        <text:p>텐서플로</text:p>
                      </text:list-item>
                      <text:list-item>
                        <text:p>사이컷-런</text:p>
                      </text:list-item>
                      <text:list-item>
                        <text:p>케라스</text:p>
                      </text:list-item>
                      <text:list-item>
                        <text:p>파이토치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python으로 할 수 있는 것들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데이터 분석</text:p>
                <text:list>
                  <text:list-item>
                    <text:p>많은 데이터 분석용 라이브러리들이 개발, 공개되어 데이터 분석에 적합한 언어로 인식되고 있다.</text:p>
                    <text:list>
                      <text:list-item>
                        <text:p>Pandas</text:p>
                      </text:list-item>
                      <text:list-item>
                        <text:p>Numpy</text:p>
                      </text:list-item>
                      <text:list-item>
                        <text:p>MatPlotLi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python으로 할 수 있는 것들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IoT(Internet of Things, 사물 인터넷)</text:p>
                <text:list>
                  <text:list-item>
                    <text:p>IoT의 선두주자 라즈베리파이(raspberry pi)에서 python을 기본 언어처럼 사용</text:p>
                    <text:list>
                      <text:list-item>
                        <text:p>라즈베리파이에 연결된 각종 센서들의 값을 python으로 분석하고 서버에 기록하는 등의 작업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python이 하기 어려운 일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실시간 작업</text:p>
                <text:list>
                  <text:list-item>
                    <text:p>real time이라 불리는 빠른 처리를 요하는 작업</text:p>
                  </text:list-item>
                  <text:list-item>
                    <text:p>python은 C언어보다 처리속도가 많이 느리다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인터프리터 언어, 대화형 언어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파이썬을 부르는 말들</text:p>
                <text:list>
                  <text:list-item>
                    <text:p>인터프리터 언어</text:p>
                  </text:list-item>
                  <text:list-item>
                    <text:p>대화형 언어</text:p>
                    <text:p/>
                  </text:list-item>
                </text:list>
              </text:list-item>
              <text:list-item>
                <text:p>사람과 컴퓨터가 대화하듯 컴퓨터에게 정보를 알려주고 그 결과를 받는 방식</text:p>
              </text:list-item>
            </text:list>
          </draw:text-box>
        </draw:frame>
        <draw:custom-shape draw:style-name="gr5" draw:text-style-name="P16" draw:layer="layout" svg:width="5.737cm" svg:height="3.904cm" svg:x="13.377cm" svg:y="3.694cm">
          <text:p text:style-name="P15"><text:span text:style-name="T11">&gt;&gt;&gt; a = 10</text:span></text:p>
          <text:p text:style-name="P15"><text:span text:style-name="T11">&gt;&gt;&gt; b = 20</text:span></text:p>
          <text:p text:style-name="P15"><text:span text:style-name="T11">&gt;&gt;&gt; a + b</text:span></text:p>
          <text:p text:style-name="P15"><text:span text:style-name="T11">30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8.023cm" svg:height="3.904cm" svg:x="19.477cm" svg:y="3.694cm">
          <text:p text:style-name="P17"><text:span text:style-name="T12">a</text:span><text:span text:style-name="T12">는 </text:span><text:span text:style-name="T12">10</text:span><text:span text:style-name="T12">이야</text:span><text:span text:style-name="T12">.</text:span></text:p>
          <text:p text:style-name="P17"><text:span text:style-name="T12">b</text:span><text:span text:style-name="T12">는 </text:span><text:span text:style-name="T12">20</text:span><text:span text:style-name="T12">이야</text:span><text:span text:style-name="T12">.</text:span></text:p>
          <text:p text:style-name="P17"><text:span text:style-name="T12">a</text:span><text:span text:style-name="T12">와 </text:span><text:span text:style-name="T12">b</text:span><text:span text:style-name="T12">를 더한 값을 보여줘</text:span></text:p>
          <text:p text:style-name="P17"><text:span text:style-name="T12">30</text:span></text:p>
          <draw:enhanced-geometry svg:viewBox="0 0 21600 21600" draw:type="rectangle" draw:enhanced-path="M 0 0 L 21600 0 21600 21600 0 21600 0 0 Z N"/>
        </draw:custom-shape>
        <draw:custom-shape draw:style-name="gr7" draw:text-style-name="P20" draw:layer="layout" svg:width="4.008cm" svg:height="0.774cm" svg:x="13.902cm" svg:y="3.257cm">
          <text:p text:style-name="P19"><text:span text:style-name="T13">python </text:span><text:span text:style-name="T13">코드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.755cm" svg:height="0.774cm" svg:x="20.002cm" svg:y="3.257cm">
          <text:p text:style-name="P19"><text:span text:style-name="T13">설명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인터프리터 언어, 대화형 언어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인터프리터 언어가 아닌 언어</text:p>
                <text:list>
                  <text:list-item>
                    <text:list>
                      <text:list-item>
                        <text:p>C언어, java 등</text:p>
                      </text:list-item>
                      <text:list-item>
                        <text:p>프로그래밍 결과 .exe 파일이 생성된다.(python은 .exe가 생성 안됨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22" draw:layer="layout" svg:width="7.483cm" svg:height="3.904cm" svg:x="4.009cm" svg:y="7.937cm">
          <text:p text:style-name="P21"><text:span text:style-name="T14">int a = 10;</text:span></text:p>
          <text:p text:style-name="P21"><text:span text:style-name="T14">int b = 20;</text:span></text:p>
          <text:p text:style-name="P21"><text:span text:style-name="T14">printf("%d", a + b);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9.135cm" svg:height="3.904cm" svg:x="11.709cm" svg:y="7.937cm">
          <text:p text:style-name="P21"><text:span text:style-name="T14">a</text:span><text:span text:style-name="T14">는 </text:span><text:span text:style-name="T14">10</text:span><text:span text:style-name="T14">이야</text:span><text:span text:style-name="T14">.</text:span></text:p>
          <text:p text:style-name="P21"><text:span text:style-name="T14">b</text:span><text:span text:style-name="T14">는 </text:span><text:span text:style-name="T14">20</text:span><text:span text:style-name="T14">이야</text:span><text:span text:style-name="T14">.</text:span></text:p>
          <text:p text:style-name="P21"><text:span text:style-name="T14">a</text:span><text:span text:style-name="T14">와 </text:span><text:span text:style-name="T14">b</text:span><text:span text:style-name="T14">를 더한 값을 보여줘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2.452cm" svg:height="0.774cm" svg:x="4.534cm" svg:y="7.5cm">
          <text:p text:style-name="P19"><text:span text:style-name="T13">c </text:span><text:span text:style-name="T13">코드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.755cm" svg:height="0.774cm" svg:x="12.234cm" svg:y="7.5cm">
          <text:p text:style-name="P19"><text:span text:style-name="T13">설명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3.799cm" svg:height="1.231cm" svg:x="4cm" svg:y="12.39cm">
          <text:p text:style-name="P23">prog1.exe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14.945cm" svg:height="0.999cm" svg:x="7.916cm" svg:y="12.545cm">
          <text:p text:style-name="P25">파일이 생성됨. exe 파일 실행 후 결과 볼 수 있음.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 presentation:user-transformed="true">
          <draw:text-box>
            <text:p>python 설치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python 다운로드</text:p>
                <text:list>
                  <text:list-item>
                    <text:p>URL: https://www.python.org</text:p>
                  </text:list-item>
                  <text:list-item>
                    <text:p>설치할 python version: 3.13.2</text:p>
                  </text:list-item>
                  <text:list-item>
                    <text:p>설치 방법 안내: <text:line-break/><text:a xlink:href="https://profkim2000.github.io/blog/dev/python/install_python" xlink:type="simple">https://profkim2000.github.io/blog/dev/python/install_python</text:a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5cm" svg:height="5.5cm" svg:x="20.5cm" svg:y="2.5cm">
          <draw:image xlink:href="Pictures/10000001000001F4000001F465BF27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python 맛보기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python 실행</text:p>
                <text:list>
                  <text:list-item>
                    <text:p>윈도우 키를 누른 후 "cmd" 입력 =&gt; 명령 프롬프트 실행</text:p>
                  </text:list-item>
                  <text:list-item>
                    <text:p>명령 프롬프트에서 "python" 실행</text:p>
                  </text:list-item>
                </text:list>
              </text:list-item>
            </text:list>
          </draw:text-box>
        </draw:frame>
        <draw:custom-shape draw:style-name="gr14" draw:text-style-name="P28" draw:layer="layout" svg:width="21.003cm" svg:height="4.217cm" svg:x="3.497cm" svg:y="8.283cm">
          <text:p text:style-name="P27"><text:span text:style-name="T15">Microsoft Windows [Version 10.0.19045.4651]</text:span></text:p>
          <text:p text:style-name="P27"><text:span text:style-name="T15">(c) Microsoft Corporation. All rights reserved.</text:span></text:p>
          <text:p text:style-name="P27"><text:span text:style-name="T15"/></text:p>
          <text:p text:style-name="P27"><text:span text:style-name="T15">C:\Users\eugene&gt;</text:span><text:span text:style-name="T16">pytho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python 맛보기: 대화형 언어 경험하기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덧셈</text:p>
              </text:list-item>
            </text:list>
            <text:p/>
            <text:p/>
            <text:p/>
            <text:list text:continue-numbering="true" text:style-name="L3">
              <text:list-item>
                <text:p>뺄셈</text:p>
              </text:list-item>
            </text:list>
          </draw:text-box>
        </draw:frame>
        <draw:custom-shape draw:style-name="gr15" draw:text-style-name="P30" draw:layer="layout" svg:width="21.003cm" svg:height="3.039cm" svg:x="2.5cm" svg:y="5cm">
          <text:p text:style-name="P29"><text:span text:style-name="T15">&gt;&gt;&gt; 1+1</text:span></text:p>
          <text:p text:style-name="P29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0" draw:layer="layout" svg:width="21.003cm" svg:height="3.039cm" svg:x="2.5cm" svg:y="10.6cm">
          <text:p text:style-name="P29"><text:span text:style-name="T15">&gt;&gt;&gt; 2-1</text:span></text:p>
          <text:p text:style-name="P29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886cm" svg:height="0.891cm" svg:x="5.826cm" svg:y="5.631cm">
          <text:p text:style-name="P19"><text:span text:style-name="T13">Enter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886cm" svg:height="0.891cm" svg:x="5.826cm" svg:y="11.231cm">
          <text:p text:style-name="P19"><text:span text:style-name="T13">Ent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python 맛보기: 대화형 언어 경험하기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곱셈</text:p>
              </text:list-item>
            </text:list>
            <text:p/>
            <text:p/>
            <text:p/>
            <text:list text:continue-numbering="true" text:style-name="L3">
              <text:list-item>
                <text:p>나눗셈</text:p>
              </text:list-item>
            </text:list>
          </draw:text-box>
        </draw:frame>
        <draw:custom-shape draw:style-name="gr15" draw:text-style-name="P30" draw:layer="layout" svg:width="21.003cm" svg:height="3.039cm" svg:x="2.5cm" svg:y="5cm">
          <text:p text:style-name="P29"><text:span text:style-name="T15">&gt;&gt;&gt; 3*4</text:span></text:p>
          <text:p text:style-name="P29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30" draw:layer="layout" svg:width="21.003cm" svg:height="3.039cm" svg:x="2.5cm" svg:y="10.6cm">
          <text:p text:style-name="P29"><text:span text:style-name="T15">&gt;&gt;&gt; 8/3</text:span></text:p>
          <text:p text:style-name="P29"><text:span text:style-name="T15">2.66666666666666666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886cm" svg:height="0.891cm" svg:x="5.826cm" svg:y="5.631cm">
          <text:p text:style-name="P19"><text:span text:style-name="T13">Enter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886cm" svg:height="0.891cm" svg:x="5.826cm" svg:y="11.231cm">
          <text:p text:style-name="P19"><text:span text:style-name="T13">Enter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 presentation:user-transformed="true">
          <draw:text-box>
            <text:p>정리 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python은 인터프리터, 대화형 언어이다.</text:p>
                <text:list>
                  <text:list-item>
                    <text:p>컴퓨터에게 정보를 주고 그에 대한 답을 받는 식이다.</text:p>
                  </text:list-item>
                  <text:list-item>
                    <text:p>이런 특성으로 C언어 등에 비해 처리 속도가 느린 편이다.</text:p>
                  </text:list-item>
                  <text:list-item>
                    <text:p/>
                  </text:list-item>
                </text:list>
              </text:list-item>
              <text:list-item>
                <text:p>python은 무료이다.</text:p>
              </text:list-item>
              <text:list-item>
                <text:p>python으로 웹사이트 제작, AI, 데이터 분석 프로그래밍이 가능하다.</text:p>
              </text:list-item>
              <text:list-item>
                <text:p>python으로는 실시간 빠른 처리가 필요한 프로그램은 만들지 않는다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정리 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python은 비교적 쉬운 문법으로 초보자들이 쉽게 사용할 수 있다.</text:p>
              </text:list-item>
              <text:list-item>
                <text:p>python은 방대한 라이브러리를 이용해 빠르게 개발할 수 있다.</text:p>
              </text:list-item>
              <text:list-item>
                <text:p>사용자가 많으니 라이브러리가 많이 만들어지고, 라이브러리가 많으니 사용자가 계속 유입되고, 유입된 사용자들이 또 라이브러리를 만들어 내는 선순환이 이루어지고 있다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단락_20_제목" presentation:presentation-page-layout-name="AL2T1">
        <office:forms form:automatic-focus="false" form:apply-design-mode="false"/>
        <draw:frame presentation:style-name="pr15" draw:layer="layout" svg:width="25.199cm" svg:height="2.629cm" svg:x="1.4cm" svg:y="7.728cm" presentation:class="title">
          <draw:text-box>
            <text:p>프로그래밍</text:p>
          </draw:text-box>
        </draw:frame>
        <draw:frame presentation:style-name="pr8" draw:layer="layout" svg:width="6cm" svg:height="0.75cm" svg:x="0cm" svg:y="1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sk_5f_기본값" presentation:presentation-page-layout-name="AL2T1">
        <office:forms form:automatic-focus="false" form:apply-design-mode="false"/>
        <draw:frame presentation:style-name="pr10" draw:layer="layout" svg:width="25.199cm" svg:height="2.629cm" svg:x="1.4cm" svg:y="0.628cm" presentation:class="title">
          <draw:text-box>
            <text:p>프로그래밍이란</text:p>
          </draw:text-box>
        </draw:frame>
        <draw:frame presentation:style-name="pr11" draw:layer="layout" svg:width="25.199cm" svg:height="10.815cm" svg:x="1.4cm" svg:y="3.685cm" presentation:class="outline">
          <draw:text-box>
            <text:list text:style-name="L3">
              <text:list-item>
                <text:p>내가 원하는 일을 컴퓨터가 할 수 있도록 순서대로 적는 것</text:p>
              </text:list-item>
              <text:list-item>
                <text:p>사람에게 일 시키는 것과 비슷하지만 훨씬 구체적으로 알려줘야 한다.</text:p>
              </text:list-item>
              <text:list-item>
                <text:p>매우 비슷한 예가 "음식 레시피"</text:p>
                <text:list>
                  <text:list-header>
                    <text:p>1. 물 550cc를 냄비에 넣는다.</text:p>
                    <text:p>2. 냄비 안의 물을 끓인다.</text:p>
                    <text:p>3. 물이 끊으면 냄비 안에 스프를 넣는다.</text:p>
                    <text:p>4. 바로 면을 넣는다.</text:p>
                    <text:p>5. 5분간 기다린다.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컴퓨터에게 할 일을 알려주는 방법<text:tab/></text:p>
          </draw:text-box>
        </draw:frame>
        <draw:frame presentation:style-name="pr14" draw:layer="layout" svg:width="25.199cm" svg:height="10.815cm" svg:x="1.4cm" svg:y="3.685cm" presentation:class="outline" presentation:user-transformed="true">
          <draw:text-box>
            <text:list text:style-name="L3">
              <text:list-item>
                <text:p>프로그래밍 언어</text:p>
                <text:list>
                  <text:list-item>
                    <text:p>파이썬, C, 자바 등</text:p>
                  </text:list-item>
                </text:list>
              </text:list-item>
              <text:list-item>
                <text:p>파이썬</text:p>
                <text:list>
                  <text:list-item>
                    <text:p>주로 AI, 업무 자동화 등에 사용, 조금 느려도 괜찮은 프로그램</text:p>
                  </text:list-item>
                </text:list>
              </text:list-item>
              <text:list-item>
                <text:p>C언어</text:p>
                <text:list>
                  <text:list-item>
                    <text:p>주로 OS(windows11), 빠른 속도를 필요로 하는 프로그램, 핵심 기능, 파이썬</text:p>
                  </text:list-item>
                </text:list>
              </text:list-item>
              <text:list-item>
                <text:p>자바</text:p>
                <text:list>
                  <text:list-item>
                    <text:p>주로 웹서버 등 웹 관련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코딩 vs 프로그래밍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그냥 혼용해서 써도 큰 문제 없음.</text:p>
              </text:list-item>
              <text:list-item>
                <text:p>미세한 차이를 굳이 얘기하자면</text:p>
                <text:list>
                  <text:list-item>
                    <text:p>코딩: 프로그래밍 언어를 타이핑하는 행위 자체</text:p>
                  </text:list-item>
                  <text:list-item>
                    <text:p>프로그래밍: 요구사항 정의, 설계, 코딩, 오류 수정 등 전체 과정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AI가 잘 하니 개발자는 더 이상 필요없다</text:p>
          </draw:text-box>
        </draw:frame>
        <draw:frame presentation:style-name="pr14" draw:layer="layout" svg:width="25.199cm" svg:height="10.815cm" svg:x="1.4cm" svg:y="3.685cm" presentation:class="outline" presentation:user-transformed="true">
          <draw:text-box>
            <text:list text:style-name="L3">
              <text:list-item>
                <text:p>코딩은 소프트웨어 개발의 일부일 뿐</text:p>
                <text:list>
                  <text:list-item>
                    <text:p>MS 어떤 팀에서는 지각한 개발자들에게 코딩을 시켰다. 다른 사람들은 설계 등에 집중</text:p>
                  </text:list-item>
                </text:list>
              </text:list-item>
              <text:list-item>
                <text:p>기술부채의 증가</text:p>
                <text:list>
                  <text:list-item>
                    <text:p>AI가 만들어준 코드로 소프트웨어 개발했는데 오류 발생 시 대처가 안되는 문제 증가</text:p>
                  </text:list-item>
                  <text:list-item>
                    <text:p>주변사항 고려없이 AI가 특정 방향의 코드만 작성해주는 문제</text:p>
                  </text:list-item>
                </text:list>
              </text:list-item>
              <text:list-item>
                <text:p>회사 요구에 의해 사직했던 개발자들이 다시 복귀하는 사례 발생<text:tab/><text:span text:style-name="T17">[</text:span><text:span text:style-name="T18"><text:a xlink:href="https://www.chosun.com/economy/weeklybiz/2026/05/07/Q3MQXHOQCVDBJKVKAO3LXFSF6I/" xlink:type="simple">기사</text:a></text:span><text:span text:style-name="T18">]</text:span></text:p>
              </text:list-item>
              <text:list-item>
                <text:p><text:span text:style-name="T19">개발자와 </text:span><text:span text:style-name="T19">AI</text:span><text:span text:style-name="T19">가 협력하는 시대로 나아가는 중</text:span></text:p>
              </text:list-item>
              <text:list-item>
                <text:p><text:span text:style-name="T19">비개발자가 스스로 앱을 만들 수 있는 환경이 조성됨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컴퓨터는 0과 1만 안다는데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맞음. 전기가 통하고(1) 안통하고(0) 이것만 처리. 이것만 매우 빠르게 처리.</text:p>
              </text:list-item>
              <text:list-item>
                <text:p>컴퓨터는 숫자만 다룬다. </text:p>
                <text:list>
                  <text:list-item>
                    <text:p>컴퓨터는 문자 모름</text:p>
                  </text:list-item>
                  <text:list-item>
                    <text:p>컴퓨터는 그림 모름</text:p>
                  </text:list-item>
                  <text:list-item>
                    <text:p>컴퓨터는 동영상, 음악 모두 모름. 그냥 숫자만 다룬다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컴퓨터에게 문자란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문자는 사실 전부 숫자로 되어 있다.</text:p>
              </text:list-item>
              <text:list-item>
                <text:p>숫자를 예쁜 글자 그림으로 화면에 배치해서 보여주는 것 - 폰트의 역할</text:p>
                <text:list>
                  <text:list-item>
                    <text:p>예: 숫자 65는 대문자 A로 예쁘게 보여준다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컴퓨터에게 그림이란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 text:style-name="P32">그림은 사실 전부 숫자로 되어 있다.</text:p>
              </text:list-item>
              <text:list-item>
                <text:p text:style-name="P32">그림은 무수히 많은 점으로 이루어져 있다.</text:p>
                <text:list>
                  <text:list-item>
                    <text:p>예: 이 그림은 가로 1000개, 세로 600개의 점으로 이루어져 있다.</text:p>
                  </text:list-item>
                </text:list>
              </text:list-item>
              <text:list-item>
                <text:p>한 개의 점은 빨간색의 강도, 초록색의 강도, 파란색의 강도, 3개의 숫자로 구성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컴퓨터에게 동영상이란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 text:style-name="P32">전부 숫자로 된 그림을 연달아 붙여 놓은 것이라 동영상도 결국 숫자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sk_5f_기본값" presentation:presentation-page-layout-name="AL2T1">
        <office:forms form:automatic-focus="false" form:apply-design-mode="false"/>
        <draw:frame presentation:style-name="pr13" draw:layer="layout" svg:width="25.199cm" svg:height="2.629cm" svg:x="1.4cm" svg:y="0.628cm" presentation:class="title">
          <draw:text-box>
            <text:p>컴퓨터에게 음악이란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 text:style-name="P32">음악은 사실 전부 숫자로 되어 있다.</text:p>
              </text:list-item>
              <text:list-item>
                <text:p text:style-name="P32">음악 파일을 열어보면 왼쪽 채널, 오른쪽 채널에서 내야 할 소리 크기의 숫자값이 순서대로 적혀있다.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단락_20_제목" presentation:presentation-page-layout-name="AL2T1">
        <office:forms form:automatic-focus="false" form:apply-design-mode="false"/>
        <draw:frame presentation:style-name="pr15" draw:layer="layout" svg:width="25.199cm" svg:height="2.629cm" svg:x="1.4cm" svg:y="7.728cm" presentation:class="title">
          <draw:text-box>
            <text:p>파이썬 기초 - 변수</text:p>
          </draw:text-box>
        </draw:frame>
        <draw:frame presentation:style-name="pr8" draw:layer="layout" svg:width="6cm" svg:height="0.75cm" svg:x="0cm" svg:y="1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단락_20_제목" presentation:presentation-page-layout-name="AL2T1">
        <office:forms form:automatic-focus="false" form:apply-design-mode="false"/>
        <draw:frame presentation:style-name="pr15" draw:layer="layout" svg:width="25.199cm" svg:height="2.629cm" svg:x="1.4cm" svg:y="7.728cm" presentation:class="title">
          <draw:text-box>
            <text:p>파이썬 기초 - 제어문</text:p>
          </draw:text-box>
        </draw:frame>
        <draw:frame presentation:style-name="pr8" draw:layer="layout" svg:width="6cm" svg:height="0.75cm" svg:x="0cm" svg:y="1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단락_20_제목" presentation:presentation-page-layout-name="AL2T1">
        <office:forms form:automatic-focus="false" form:apply-design-mode="false"/>
        <draw:frame presentation:style-name="pr15" draw:layer="layout" svg:width="25.199cm" svg:height="2.629cm" svg:x="1.4cm" svg:y="7.728cm" presentation:class="title">
          <draw:text-box>
            <text:p>기존 파이썬 프로그램 활용하기</text:p>
          </draw:text-box>
        </draw:frame>
        <draw:frame presentation:style-name="pr8" draw:layer="layout" svg:width="6cm" svg:height="0.75cm" svg:x="0cm" svg:y="1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단락_20_제목" presentation:presentation-page-layout-name="AL2T1">
        <office:forms form:automatic-focus="false" form:apply-design-mode="false"/>
        <draw:frame presentation:style-name="pr15" draw:layer="layout" svg:width="25.199cm" svg:height="2.629cm" svg:x="1.4cm" svg:y="7.728cm" presentation:class="title">
          <draw:text-box>
            <text:p>측량과 공간정보에 사용하는 파이썬</text:p>
          </draw:text-box>
        </draw:frame>
        <draw:frame presentation:style-name="pr8" draw:layer="layout" svg:width="6cm" svg:height="0.75cm" svg:x="0cm" svg:y="1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sk_5f_기본값" presentation:presentation-page-layout-name="AL2T1">
        <office:forms form:automatic-focus="false" form:apply-design-mode="false"/>
        <draw:frame presentation:style-name="pr10" draw:layer="layout" svg:width="25.199cm" svg:height="2.629cm" svg:x="1.4cm" svg:y="0.628cm" presentation:class="title">
          <draw:text-box>
            <text:p>참고자료</text:p>
          </draw:text-box>
        </draw:frame>
        <draw:frame presentation:style-name="pr14" draw:layer="layout" svg:width="25.199cm" svg:height="10.815cm" svg:x="1.4cm" svg:y="3.685cm" presentation:class="outline">
          <draw:text-box>
            <text:list text:style-name="L3">
              <text:list-item>
                <text:p><text:span text:style-name="T20">도서</text:span></text:p>
                <text:list>
                  <text:list-item>
                    <text:p><text:span text:style-name="T21">처음 배우는 머신러닝 </text:span><text:span text:style-name="T21">/ </text:span><text:span text:style-name="T21">김승연</text:span><text:span text:style-name="T21">, </text:span><text:span text:style-name="T21">정용주 </text:span><text:span text:style-name="T21">/ </text:span><text:span text:style-name="T21">한빛미디어 </text:span><text:span text:style-name="T21">/ 2017</text:span></text:p>
                  </text:list-item>
                  <text:list-item>
                    <text:p><text:span text:style-name="T21">텐서플로와 머신러닝으로 시작하는 자연어 처리 </text:span><text:span text:style-name="T21">/ <text:s/></text:span><text:span text:style-name="T21">전창욱</text:span><text:span text:style-name="T21">, </text:span><text:span text:style-name="T21">최태균</text:span><text:span text:style-name="T21">, </text:span><text:span text:style-name="T21">조중현 </text:span><text:span text:style-name="T21">/ </text:span><text:span text:style-name="T21">위키북스 </text:span><text:span text:style-name="T21">/ 2019</text:span></text:p>
                  </text:list-item>
                  <text:list-item>
                    <text:p><text:span text:style-name="T21">케라스 창시자에게 배우는 딥러닝 </text:span><text:span text:style-name="T21">/ </text:span><text:span text:style-name="T21">프랑소와 숄레 </text:span><text:span text:style-name="T21">/ </text:span><text:span text:style-name="T21">길벗 </text:span><text:span text:style-name="T21">/ 2018</text:span></text:p>
                  </text:list-item>
                  <text:list-item>
                    <text:p><text:span text:style-name="T21">AI </text:span><text:span text:style-name="T21">리터러시 기초 </text:span><text:span text:style-name="T21">/ Ben Jones / </text:span><text:span text:style-name="T21">한국마케팅교육 </text:span><text:span text:style-name="T21">/ 2025 </text:span></text:p>
                  </text:list-item>
                  <text:list-item>
                    <text:p><text:span text:style-name="T21">LLM</text:span><text:span text:style-name="T21">을 활용한 </text:span><text:span text:style-name="T21">AI </text:span><text:span text:style-name="T21">에이전트 개발 입문 </text:span><text:span text:style-name="T21">/ 2025</text:span><text:line-break/></text:p>
                  </text:list-item>
                </text:list>
              </text:list-item>
              <text:list-item>
                <text:p><text:span text:style-name="T20">자료</text:span></text:p>
                <text:list>
                  <text:list-item>
                    <text:p><text:span text:style-name="T21">AI </text:span><text:span text:style-name="T21">리터러시</text:span><text:span text:style-name="T21">(</text:span><text:span text:style-name="T21">행정안전부 </text:span><text:span text:style-name="T21">/ 2025)</text:span></text:p>
                  </text:list-item>
                  <text:list-item>
                    <text:p><text:span text:style-name="T21">관리자 </text:span><text:span text:style-name="T21">AI </text:span><text:span text:style-name="T21">리더십</text:span><text:span text:style-name="T21">(</text:span><text:span text:style-name="T21">행정안전부 </text:span><text:span text:style-name="T21">/ 2025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기본값">
        <office:forms form:automatic-focus="false" form:apply-design-mode="false"/>
        <draw:frame draw:name="제목 113" presentation:style-name="pr16" draw:text-style-name="P34" draw:layer="layout" svg:width="24.15cm" svg:height="3.043cm" svg:x="1.923cm" svg:y="0.838cm" presentation:class="title" presentation:user-transformed="true">
          <draw:text-box>
            <text:p text:style-name="P33"><text:span text:style-name="T22">License</text:span></text:p>
          </draw:text-box>
        </draw:frame>
        <draw:frame draw:name="내용 개체 틀 2" presentation:style-name="pr17" draw:text-style-name="P36" draw:layer="layout" svg:width="25.175cm" svg:height="9.992cm" svg:x="1.471cm" svg:y="4.192cm" presentation:class="outline" presentation:user-transformed="true">
          <draw:text-box>
            <text:p text:style-name="P35"><text:span text:style-name="T23">copyright 2026. </text:span><text:span text:style-name="T24">김문식 </text:span><text:span text:style-name="T24">All rights reserved.</text:span></text:p>
            <text:p text:style-name="P35"><text:span text:style-name="T24"/></text:p>
            <text:p text:style-name="P35"><text:span text:style-name="T24">이 자료는 국토정보교육원 내에서</text:span><text:span text:style-name="T24">, </text:span><text:span text:style-name="T24">교육 목적의 수업을 위해서만 사용 가능하며</text:span><text:span text:style-name="T24">, </text:span></text:p>
            <text:p text:style-name="P35"><text:span text:style-name="T24">이 외의 공간에서 저작물을 공유 또는 게시하는 행위는 저작권법 위반에 해당할 수 있습니다</text:span><text:span text:style-name="T24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ookieRun Bold" svg:font-family="'CookieRun Bold'" style:font-adornments="Regular" style:font-family-generic="modern" style:font-pitch="variable"/>
    <style:font-face style:name="CookieRun Bold1" svg:font-family="'CookieRun Bold'" style:font-family-generic="modern" style:font-pitch="variable"/>
    <style:font-face style:name="CookieRun Bold2" svg:font-family="'CookieRun Bold'"/>
    <style:font-face style:name="D2Coding" svg:font-family="D2Coding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modern" style:font-pitch="variable"/>
    <style:font-face style:name="나눔고딕 ExtraBold" svg:font-family="'나눔고딕 ExtraBold'" style:font-adornments="Bold" style:font-family-generic="modern" style:font-pitch="variable"/>
    <style:font-face style:name="나눔고딕 ExtraBold1" svg:font-family="'나눔고딕 ExtraBold'" style:font-family-generic="modern" style:font-pitch="variable"/>
    <style:font-face style:name="나눔고딕1" svg:font-family="나눔고딕" style:font-family-generic="roman" style:font-pitch="variable"/>
    <style:font-face style:name="나눔고딕2" svg:font-family="나눔고딕" style:font-adornments="Bold" style:font-pitch="variable"/>
    <style:font-face style:name="나눔고딕3" svg:font-family="나눔고딕" style:font-family-generic="system" style:font-pitch="variable"/>
    <style:font-face style:name="나눔고딕4" svg:font-family="나눔고딕" style:font-adornments="굵게" style:font-family-generic="modern" style:font-pitch="variable"/>
    <style:font-face style:name="맑은 고딕" svg:font-family="'맑은 고딕'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나눔고딕1" fo:font-size="24pt" fo:language="en" fo:country="US" style:font-name-asian="나눔고딕3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3" style:font-family-asian="나눔고딕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나눔고딕1" fo:font-family="나눔고딕" style:font-family-generic="roman" style:font-pitch="variable" fo:font-size="18pt" style:letter-kerning="true" style:font-name-asian="나눔고딕3" style:font-family-asian="나눔고딕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sk_5f_기본값-background" style:display-name="msk_기본값-background" style:family="presentation">
      <style:graphic-properties draw:stroke="none" draw:fill="none"/>
      <style:text-properties style:letter-kerning="true"/>
    </style:style>
    <style:style style:name="msk_5f_기본값-backgroundobjects" style:display-name="msk_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sk_5f_기본값-notes" style:display-name="msk_기본값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sk_5f_기본값-outline1" style:display-name="msk_기본값-outline1" style:family="presentation">
      <style:graphic-properties draw:stroke="none" draw:fill="none" draw:auto-grow-height="false" draw:fit-to-size="false" style:shrink-to-fit="true">
        <text:list-style style:name="msk_5f_기본값-outline1" style:display-name="msk_기본값-outline1">
          <text:list-level-style-bullet text:level="1" text:bullet-char="▪">
            <style:list-level-properties text:space-before="0.3cm" text:min-label-width="0.75cm"/>
            <style:text-properties fo:font-family="OpenSymbol" style:font-charset="x-symbol" style:use-window-font-color="true" fo:font-size="100%"/>
          </text:list-level-style-bullet>
          <text:list-level-style-bullet text:level="2" text:bullet-char="–">
            <style:list-level-properties text:space-before="1.2cm" text:min-label-width="0.7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cm" text:min-label-width="0.6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loext:opacity="0%" style:text-outline="false" style:text-line-through-style="none" style:text-line-through-type="none" style:font-name="나눔고딕 ExtraBold1" fo:font-family="'나눔고딕 ExtraBold'" style:font-family-generic="modern" style:font-pitch="variable" fo:font-size="20pt" fo:font-style="normal" fo:text-shadow="none" style:text-underline-style="none" fo:font-weight="normal" style:letter-kerning="true" fo:background-color="transparent" style:font-name-asian="나눔고딕 ExtraBold1" style:font-family-asian="'나눔고딕 ExtraBold'" style:font-family-generic-asian="modern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msk_5f_기본값-outline2" style:display-name="msk_기본값-outline2" style:family="presentation" style:parent-style-name="msk_5f_기본값-outline1">
      <style:paragraph-properties fo:margin-top="0.4cm" fo:margin-bottom="0cm"/>
      <style:text-properties style:font-name="나눔고딕" fo:font-family="나눔고딕" style:font-family-generic="modern" style:font-pitch="variable" fo:font-size="18pt" fo:font-weight="normal" style:font-name-asian="나눔고딕" style:font-family-asian="나눔고딕" style:font-family-generic-asian="modern" style:font-pitch-asian="variable" style:font-size-asian="18pt" style:font-weight-asian="normal" style:font-size-complex="18pt" style:font-weight-complex="normal"/>
    </style:style>
    <style:style style:name="msk_5f_기본값-outline3" style:display-name="msk_기본값-outline3" style:family="presentation" style:parent-style-name="msk_5f_기본값-outline2">
      <style:paragraph-properties fo:margin-top="0.3cm" fo:margin-bottom="0cm"/>
      <style:text-properties style:font-name="나눔고딕" fo:font-family="나눔고딕" style:font-family-generic="modern" style:font-pitch="variable" fo:font-size="16pt" style:font-name-asian="나눔고딕" style:font-family-asian="나눔고딕" style:font-family-generic-asian="modern" style:font-pitch-asian="variable" style:font-size-asian="16pt" style:font-size-complex="16pt"/>
    </style:style>
    <style:style style:name="msk_5f_기본값-outline4" style:display-name="msk_기본값-outline4" style:family="presentation" style:parent-style-name="msk_5f_기본값-outline3">
      <style:paragraph-properties fo:margin-top="0.2cm" fo:margin-bottom="0cm"/>
      <style:text-properties style:font-name="나눔고딕" fo:font-family="나눔고딕" style:font-family-generic="modern" style:font-pitch="variable" fo:font-size="16pt" style:font-name-asian="나눔고딕" style:font-family-asian="나눔고딕" style:font-family-generic-asian="modern" style:font-pitch-asian="variable" style:font-size-asian="16pt" style:font-size-complex="16pt"/>
    </style:style>
    <style:style style:name="msk_5f_기본값-outline5" style:display-name="msk_기본값-outline5" style:family="presentation" style:parent-style-name="msk_5f_기본값-outline4">
      <style:paragraph-properties fo:margin-top="0.1cm" fo:margin-bottom="0cm"/>
      <style:text-properties style:font-name="나눔고딕" fo:font-family="나눔고딕" style:font-family-generic="modern" style:font-pitch="variable" fo:font-size="16pt" style:font-name-asian="나눔고딕" style:font-family-asian="나눔고딕" style:font-family-generic-asian="modern" style:font-pitch-asian="variable" style:font-size-asian="16pt" style:font-size-complex="16pt"/>
    </style:style>
    <style:style style:name="msk_5f_기본값-outline6" style:display-name="msk_기본값-outline6" style:family="presentation" style:parent-style-name="msk_5f_기본값-outline5">
      <style:paragraph-properties fo:margin-top="0.1cm" fo:margin-bottom="0cm"/>
      <style:text-properties style:font-name="나눔고딕" fo:font-family="나눔고딕" style:font-family-generic="modern" style:font-pitch="variable" fo:font-size="16pt" style:font-name-asian="나눔고딕" style:font-family-asian="나눔고딕" style:font-family-generic-asian="modern" style:font-pitch-asian="variable" style:font-size-asian="16pt" style:font-size-complex="16pt"/>
    </style:style>
    <style:style style:name="msk_5f_기본값-outline7" style:display-name="msk_기본값-outline7" style:family="presentation" style:parent-style-name="msk_5f_기본값-outline6">
      <style:paragraph-properties fo:margin-top="0.1cm" fo:margin-bottom="0cm"/>
      <style:text-properties style:font-name="나눔고딕" fo:font-family="나눔고딕" style:font-family-generic="modern" style:font-pitch="variable" fo:font-size="16pt" style:font-name-asian="나눔고딕" style:font-family-asian="나눔고딕" style:font-family-generic-asian="modern" style:font-pitch-asian="variable" style:font-size-asian="16pt" style:font-size-complex="16pt"/>
    </style:style>
    <style:style style:name="msk_5f_기본값-outline8" style:display-name="msk_기본값-outline8" style:family="presentation" style:parent-style-name="msk_5f_기본값-outline7">
      <style:paragraph-properties fo:margin-top="0.1cm" fo:margin-bottom="0cm"/>
      <style:text-properties fo:font-size="20pt" style:font-size-asian="20pt" style:font-size-complex="20pt"/>
    </style:style>
    <style:style style:name="msk_5f_기본값-outline9" style:display-name="msk_기본값-outline9" style:family="presentation" style:parent-style-name="msk_5f_기본값-outline8">
      <style:paragraph-properties fo:margin-top="0.1cm" fo:margin-bottom="0cm"/>
      <style:text-properties fo:font-size="20pt" style:font-size-asian="20pt" style:font-size-complex="20pt"/>
    </style:style>
    <style:style style:name="msk_5f_기본값-subtitle" style:display-name="msk_기본값-subtitle" style:family="presentation">
      <style:graphic-properties draw:stroke="none" draw:fill="none" draw:textarea-vertical-align="middle">
        <text:list-style style:name="msk_5f_기본값-subtitle" style:display-name="msk_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sk_5f_기본값-title" style:display-name="msk_기본값-title" style:family="presentation">
      <style:graphic-properties draw:stroke="none" draw:fill="none" draw:textarea-vertical-align="middle">
        <text:list-style style:name="msk_5f_기본값-title" style:display-name="msk_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CookieRun Bold1" fo:font-family="'CookieRun Bold'" style:font-family-generic="modern" style:font-pitch="variable" fo:font-size="38pt" fo:font-style="normal" fo:text-shadow="none" style:text-underline-style="none" fo:font-weight="normal" style:letter-kerning="true" fo:background-color="transparent" style:font-name-asian="CookieRun Bold1" style:font-family-asian="'CookieRun Bold'" style:font-family-generic-asian="modern" style:font-pitch-asian="variable" style:font-size-asian="38pt" style:font-style-asian="normal" style:font-weight-asian="normal" style:font-name-complex="Lucida Sans" style:font-family-complex="'Lucida Sans'" style:font-family-generic-complex="system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단락_20_제목-background" style:display-name="단락 제목-background" style:family="presentation">
      <style:graphic-properties draw:stroke="none" draw:fill="none"/>
      <style:text-properties style:letter-kerning="true"/>
    </style:style>
    <style:style style:name="단락_20_제목-backgroundobjects" style:display-name="단락 제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단락_20_제목-notes" style:display-name="단락 제목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단락_20_제목-outline1" style:display-name="단락 제목-outline1" style:family="presentation">
      <style:graphic-properties draw:stroke="none" draw:fill="none" draw:textarea-horizontal-align="center" draw:auto-grow-height="false" draw:fit-to-size="false" style:shrink-to-fit="true">
        <text:list-style style:name="단락_20_제목-outline1" style:display-name="단락 제목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" fo:font-family="'나눔고딕 ExtraBold'" style:font-style-name="Bold" style:font-family-generic="modern" style:font-pitch="variable" fo:font-size="32pt" fo:font-style="normal" fo:text-shadow="none" style:text-underline-style="none" fo:font-weight="normal" style:letter-kerning="true" fo:background-color="transparent" style:font-name-asian="나눔고딕 ExtraBold" style:font-family-asian="'나눔고딕 ExtraBold'" style:font-style-name-asian="Bold" style:font-family-generic-asian="modern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단락_20_제목-outline2" style:display-name="단락 제목-outline2" style:family="presentation" style:parent-style-name="단락_20_제목-outline1">
      <style:paragraph-properties fo:margin-top="0.4cm" fo:margin-bottom="0cm"/>
      <style:text-properties fo:font-size="28pt" style:font-size-asian="28pt" style:font-size-complex="28pt"/>
    </style:style>
    <style:style style:name="단락_20_제목-outline3" style:display-name="단락 제목-outline3" style:family="presentation" style:parent-style-name="단락_20_제목-outline2">
      <style:paragraph-properties fo:margin-top="0.3cm" fo:margin-bottom="0cm"/>
      <style:text-properties fo:font-size="24pt" style:font-size-asian="24pt" style:font-size-complex="24pt"/>
    </style:style>
    <style:style style:name="단락_20_제목-outline4" style:display-name="단락 제목-outline4" style:family="presentation" style:parent-style-name="단락_20_제목-outline3">
      <style:paragraph-properties fo:margin-top="0.2cm" fo:margin-bottom="0cm"/>
      <style:text-properties fo:font-size="20pt" style:font-size-asian="20pt" style:font-size-complex="20pt"/>
    </style:style>
    <style:style style:name="단락_20_제목-outline5" style:display-name="단락 제목-outline5" style:family="presentation" style:parent-style-name="단락_20_제목-outline4">
      <style:paragraph-properties fo:margin-top="0.1cm" fo:margin-bottom="0cm"/>
      <style:text-properties fo:font-size="20pt" style:font-size-asian="20pt" style:font-size-complex="20pt"/>
    </style:style>
    <style:style style:name="단락_20_제목-outline6" style:display-name="단락 제목-outline6" style:family="presentation" style:parent-style-name="단락_20_제목-outline5">
      <style:paragraph-properties fo:margin-top="0.1cm" fo:margin-bottom="0cm"/>
      <style:text-properties fo:font-size="6pt" style:font-size-asian="6pt" style:font-size-complex="6pt"/>
    </style:style>
    <style:style style:name="단락_20_제목-outline7" style:display-name="단락 제목-outline7" style:family="presentation" style:parent-style-name="단락_20_제목-outline6">
      <style:paragraph-properties fo:margin-top="0.1cm" fo:margin-bottom="0cm"/>
      <style:text-properties fo:font-size="20pt" style:font-size-asian="20pt" style:font-size-complex="20pt"/>
    </style:style>
    <style:style style:name="단락_20_제목-outline8" style:display-name="단락 제목-outline8" style:family="presentation" style:parent-style-name="단락_20_제목-outline7">
      <style:paragraph-properties fo:margin-top="0.1cm" fo:margin-bottom="0cm"/>
      <style:text-properties fo:font-size="20pt" style:font-size-asian="20pt" style:font-size-complex="20pt"/>
    </style:style>
    <style:style style:name="단락_20_제목-outline9" style:display-name="단락 제목-outline9" style:family="presentation" style:parent-style-name="단락_20_제목-outline8">
      <style:paragraph-properties fo:margin-top="0.1cm" fo:margin-bottom="0cm"/>
      <style:text-properties fo:font-size="20pt" style:font-size-asian="20pt" style:font-size-complex="20pt"/>
    </style:style>
    <style:style style:name="단락_20_제목-subtitle" style:display-name="단락 제목-subtitle" style:family="presentation">
      <style:graphic-properties draw:stroke="none" draw:fill="none" draw:textarea-vertical-align="middle">
        <text:list-style style:name="단락_20_제목-subtitle" style:display-name="단락 제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단락_20_제목-title" style:display-name="단락 제목-title" style:family="presentation">
      <style:graphic-properties draw:stroke="none" draw:fill="none" draw:textarea-vertical-align="middle">
        <text:list-style style:name="단락_20_제목-title" style:display-name="단락 제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" fo:font-family="'나눔고딕 ExtraBold'" style:font-style-name="Bold" style:font-family-generic="modern" style:font-pitch="variable" fo:font-size="26pt" fo:font-style="normal" fo:text-shadow="none" style:text-underline-style="none" fo:font-weight="normal" style:letter-kerning="true" fo:background-color="transparent" style:font-name-asian="나눔고딕 ExtraBold" style:font-family-asian="'나눔고딕 ExtraBold'" style:font-style-name-asian="Bold" style:font-family-generic-asian="modern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_5f_단락_20_제목-background" style:display-name="1_단락 제목-background" style:family="presentation">
      <style:graphic-properties draw:stroke="none" draw:fill="none"/>
      <style:text-properties style:letter-kerning="true"/>
    </style:style>
    <style:style style:name="_31__5f_단락_20_제목-backgroundobjects" style:display-name="1_단락 제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단락_20_제목-notes" style:display-name="1_단락 제목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단락_20_제목-outline1" style:display-name="1_단락 제목-outline1" style:family="presentation">
      <style:graphic-properties draw:stroke="none" draw:fill="none" draw:textarea-horizontal-align="center" draw:auto-grow-height="false" draw:fit-to-size="false" style:shrink-to-fit="true">
        <text:list-style style:name="_31__5f_단락_20_제목-outline1" style:display-name="1_단락 제목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" fo:font-family="'나눔고딕 ExtraBold'" style:font-style-name="Bold" style:font-family-generic="modern" style:font-pitch="variable" fo:font-size="32pt" fo:font-style="normal" fo:text-shadow="none" style:text-underline-style="none" fo:font-weight="normal" style:letter-kerning="true" fo:background-color="transparent" style:font-name-asian="나눔고딕 ExtraBold" style:font-family-asian="'나눔고딕 ExtraBold'" style:font-style-name-asian="Bold" style:font-family-generic-asian="modern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단락_20_제목-outline2" style:display-name="1_단락 제목-outline2" style:family="presentation" style:parent-style-name="_31__5f_단락_20_제목-outline1">
      <style:paragraph-properties fo:margin-top="0.4cm" fo:margin-bottom="0cm"/>
      <style:text-properties fo:font-size="28pt" style:font-size-asian="28pt" style:font-size-complex="28pt"/>
    </style:style>
    <style:style style:name="_31__5f_단락_20_제목-outline3" style:display-name="1_단락 제목-outline3" style:family="presentation" style:parent-style-name="_31__5f_단락_20_제목-outline2">
      <style:paragraph-properties fo:margin-top="0.3cm" fo:margin-bottom="0cm"/>
      <style:text-properties fo:font-size="24pt" style:font-size-asian="24pt" style:font-size-complex="24pt"/>
    </style:style>
    <style:style style:name="_31__5f_단락_20_제목-outline4" style:display-name="1_단락 제목-outline4" style:family="presentation" style:parent-style-name="_31__5f_단락_20_제목-outline3">
      <style:paragraph-properties fo:margin-top="0.2cm" fo:margin-bottom="0cm"/>
      <style:text-properties fo:font-size="20pt" style:font-size-asian="20pt" style:font-size-complex="20pt"/>
    </style:style>
    <style:style style:name="_31__5f_단락_20_제목-outline5" style:display-name="1_단락 제목-outline5" style:family="presentation" style:parent-style-name="_31__5f_단락_20_제목-outline4">
      <style:paragraph-properties fo:margin-top="0.1cm" fo:margin-bottom="0cm"/>
      <style:text-properties fo:font-size="20pt" style:font-size-asian="20pt" style:font-size-complex="20pt"/>
    </style:style>
    <style:style style:name="_31__5f_단락_20_제목-outline6" style:display-name="1_단락 제목-outline6" style:family="presentation" style:parent-style-name="_31__5f_단락_20_제목-outline5">
      <style:paragraph-properties fo:margin-top="0.1cm" fo:margin-bottom="0cm"/>
      <style:text-properties fo:font-size="6pt" style:font-size-asian="6pt" style:font-size-complex="6pt"/>
    </style:style>
    <style:style style:name="_31__5f_단락_20_제목-outline7" style:display-name="1_단락 제목-outline7" style:family="presentation" style:parent-style-name="_31__5f_단락_20_제목-outline6">
      <style:paragraph-properties fo:margin-top="0.1cm" fo:margin-bottom="0cm"/>
      <style:text-properties fo:font-size="20pt" style:font-size-asian="20pt" style:font-size-complex="20pt"/>
    </style:style>
    <style:style style:name="_31__5f_단락_20_제목-outline8" style:display-name="1_단락 제목-outline8" style:family="presentation" style:parent-style-name="_31__5f_단락_20_제목-outline7">
      <style:paragraph-properties fo:margin-top="0.1cm" fo:margin-bottom="0cm"/>
      <style:text-properties fo:font-size="20pt" style:font-size-asian="20pt" style:font-size-complex="20pt"/>
    </style:style>
    <style:style style:name="_31__5f_단락_20_제목-outline9" style:display-name="1_단락 제목-outline9" style:family="presentation" style:parent-style-name="_31__5f_단락_20_제목-outline8">
      <style:paragraph-properties fo:margin-top="0.1cm" fo:margin-bottom="0cm"/>
      <style:text-properties fo:font-size="20pt" style:font-size-asian="20pt" style:font-size-complex="20pt"/>
    </style:style>
    <style:style style:name="_31__5f_단락_20_제목-subtitle" style:display-name="1_단락 제목-subtitle" style:family="presentation">
      <style:graphic-properties draw:stroke="none" draw:fill="none" draw:textarea-vertical-align="middle">
        <text:list-style style:name="_31__5f_단락_20_제목-subtitle" style:display-name="1_단락 제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단락_20_제목-title" style:display-name="1_단락 제목-title" style:family="presentation">
      <style:graphic-properties draw:stroke="none" draw:fill="none" draw:textarea-vertical-align="middle">
        <text:list-style style:name="_31__5f_단락_20_제목-title" style:display-name="1_단락 제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" fo:font-family="'나눔고딕 ExtraBold'" style:font-style-name="Bold" style:font-family-generic="modern" style:font-pitch="variable" fo:font-size="26pt" fo:font-style="normal" fo:text-shadow="none" style:text-underline-style="none" fo:font-weight="normal" style:letter-kerning="true" fo:background-color="transparent" style:font-name-asian="나눔고딕 ExtraBold" style:font-family-asian="'나눔고딕 ExtraBold'" style:font-style-name-asian="Bold" style:font-family-generic-asian="modern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제목_20_및_20_내용-background" style:display-name="제목 및 내용-background" style:family="presentation">
      <style:graphic-properties draw:stroke="none" draw:fill="none" loext:fill-use-slide-background="false" draw:opacity="20%" style:repeat="stretch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false" style:shrink-to-fit="true" style:writing-mode="lr-tb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나눔고딕2" fo:font-family="나눔고딕" style:font-style-name="Bold" style:font-pitch="variable" fo:font-size="23.1000003814697pt" fo:letter-spacing="normal" fo:font-style="normal" fo:text-shadow="none" style:text-underline-style="none" fo:font-weight="normal" style:letter-kerning="true" fo:background-color="transparent" style:font-name-asian="나눔고딕2" style:font-family-asian="나눔고딕" style:font-style-name-asian="Bold" style:font-pitch-asian="variable" style:font-size-asian="28pt" style:language-asian="ko" style:country-asian="KR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>
        <loext:char-complex-color loext:theme-type="dark1" loext:color-type="theme"/>
      </style:text-properties>
    </style:style>
    <style:style style:name="제목_20_및_20_내용-outline2" style:display-name="제목 및 내용-outline2" style:family="presentation" style:parent-style-name="제목_20_및_20_내용-outline1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나눔고딕2" fo:font-family="나눔고딕" style:font-style-name="Bold" style:font-pitch="variable" fo:font-size="16.5pt" fo:letter-spacing="normal" fo:font-style="normal" style:text-underline-style="none" fo:font-weight="normal" fo:background-color="transparent" style:font-name-asian="나눔고딕2" style:font-family-asian="나눔고딕" style:font-style-name-asian="Bold" style:font-pitch-asian="variable" style:font-size-asian="20pt" style:font-style-asian="normal" style:font-weight-asian="normal" style:font-size-complex="20pt" style:font-style-complex="normal" style:font-weight-complex="normal" fo:hyphenate="true">
        <loext:char-complex-color loext:theme-type="dark1" loext:color-type="theme"/>
      </style:text-properties>
    </style:style>
    <style:style style:name="제목_20_및_20_내용-outline3" style:display-name="제목 및 내용-outline3" style:family="presentation" style:parent-style-name="제목_20_및_20_내용-outline2">
      <style:graphic-properties style:writing-mode="lr-tb"/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나눔고딕2" fo:font-family="나눔고딕" style:font-style-name="Bold" style:font-pitch="variable" fo:font-size="14.8999996185303pt" fo:letter-spacing="normal" fo:font-style="normal" style:text-underline-style="none" fo:font-weight="normal" fo:background-color="transparent" style:font-name-asian="나눔고딕2" style:font-family-asian="나눔고딕" style:font-style-name-asian="Bold" style:font-pitch-asian="variable" style:font-size-asian="18pt" style:font-style-asian="normal" style:font-weight-asian="normal" style:font-size-complex="18pt" style:font-style-complex="normal" style:font-weight-complex="normal" fo:hyphenate="true">
        <loext:char-complex-color loext:theme-type="dark1" loext:color-type="theme"/>
      </style:text-properties>
    </style:style>
    <style:style style:name="제목_20_및_20_내용-outline4" style:display-name="제목 및 내용-outline4" style:family="presentation" style:parent-style-name="제목_20_및_20_내용-outline3">
      <style:graphic-properties style:writing-mode="lr-tb"/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나눔고딕2" fo:font-family="나눔고딕" style:font-style-name="Bold" style:font-pitch="variable" fo:font-size="14.8999996185303pt" fo:letter-spacing="normal" fo:font-style="normal" style:text-underline-style="none" fo:font-weight="normal" fo:background-color="transparent" style:font-name-asian="나눔고딕2" style:font-family-asian="나눔고딕" style:font-style-name-asian="Bold" style:font-pitch-asian="variable" style:font-size-asian="18pt" style:font-style-asian="normal" style:font-weight-asian="normal" style:font-size-complex="18pt" style:font-style-complex="normal" style:font-weight-complex="normal" fo:hyphenate="true">
        <loext:char-complex-color loext:theme-type="dark1" loext:color-type="theme"/>
      </style:text-properties>
    </style:style>
    <style:style style:name="제목_20_및_20_내용-outline5" style:display-name="제목 및 내용-outline5" style:family="presentation" style:parent-style-name="제목_20_및_20_내용-outline4">
      <style:paragraph-properties fo:margin-left="0cm" fo:margin-right="0cm" fo:margin-top="0.082cm" fo:margin-bottom="0cm" fo:text-indent="0cm"/>
      <style:text-properties style:font-name="나눔고딕2" fo:font-family="나눔고딕" style:font-style-name="Bold" style:font-pitch="variable" fo:font-size="16.5pt" style:font-name-asian="나눔고딕2" style:font-family-asian="나눔고딕" style:font-style-name-asian="Bold" style:font-pitch-asian="variable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 style:writing-mode="lr-tb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okieRun Bold" fo:font-family="'CookieRun Bold'" style:font-style-name="Regular" style:font-family-generic="modern" style:font-pitch="variable" fo:font-size="14.8999996185303pt" fo:letter-spacing="normal" fo:font-style="normal" fo:text-shadow="none" style:text-underline-style="none" fo:font-weight="bold" style:letter-kerning="true" fo:background-color="transparent" style:font-name-asian="나눔고딕4" style:font-family-asian="나눔고딕" style:font-style-name-asian="굵게" style:font-family-generic-asian="modern" style:font-pitch-asian="variable" style:font-size-asian="18pt" style:language-asian="ko" style:country-asian="KR" style:font-style-asian="normal" style:font-weight-asian="600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opacity="2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5cm" fo:min-width="0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sk_5f_기본값-outline1">
      <style:graphic-properties fo:min-height="9.135cm" loext:decorative="false"/>
      <style:paragraph-properties style:writing-mode="lr-tb"/>
    </style:style>
    <style:style style:name="Mpr5" style:family="presentation" style:parent-style-name="단락_20_제목-outline1">
      <style:graphic-properties draw:fit-to-size="false" style:shrink-to-fit="false" fo:min-height="9.135cm" loext:decorative="false"/>
      <style:paragraph-properties style:writing-mode="lr-tb"/>
    </style:style>
    <style:style style:name="Mpr6" style:family="presentation" style:parent-style-name="단락_20_제목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단락_20_제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단락_20_제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_31__5f_단락_20_제목-outline1">
      <style:graphic-properties draw:fit-to-size="false" style:shrink-to-fit="false" fo:min-height="9.135cm" loext:decorative="false"/>
      <style:paragraph-properties style:writing-mode="lr-tb"/>
    </style:style>
    <style:style style:name="Mpr10" style:family="presentation" style:parent-style-name="_31__5f_단락_20_제목-title">
      <style:graphic-properties draw:auto-grow-height="false" fo:min-height="2.63cm" loext:decorative="false"/>
      <style:paragraph-properties style:writing-mode="lr-tb"/>
    </style:style>
    <style:style style:name="Mpr11" style:family="presentation" style:parent-style-name="_31__5f_단락_20_제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_31__5f_단락_20_제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제목_20_및_20_내용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제목_20_및_20_내용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제목_20_및_20_내용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제목_20_및_20_내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6pt" style:font-size-asian="6pt" style:font-size-complex="6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 draw:fill-color="#ffffff"/>
      <style:paragraph-properties fo:text-align="center"/>
      <style:text-properties style:font-name="나눔고딕 ExtraBold" fo:font-size="40pt" style:font-name-asian="나눔고딕 ExtraBold" style:font-size-asian="40pt" style:font-size-complex="40pt"/>
    </style:style>
    <style:style style:name="MP11" style:family="paragraph">
      <loext:graphic-properties draw:fill="none" draw:fill-color="#ffffff"/>
      <style:paragraph-properties fo:text-align="center"/>
      <style:text-properties style:font-name="나눔고딕 ExtraBold" fo:font-size="34pt" style:font-name-asian="나눔고딕 ExtraBold" style:font-size-asian="34pt" style:font-size-complex="34pt"/>
    </style:style>
    <style:style style:name="M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tru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tru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true"/>
    </style:style>
    <style:style style:name="MP1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28pt" fo:hyphenate="tru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tru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style:paragraph-properties fo:text-align="center"/>
      <style:text-properties fo:font-size="12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5.40000009536743pt" style:font-size-asian="5.40000009536743pt" style:font-size-complex="5.40000009536743pt"/>
    </style:style>
    <style:style style:name="MT4" style:family="text">
      <style:text-properties fo:font-size="4.40000009536743pt" style:font-size-asian="4.40000009536743pt" style:font-size-complex="4.40000009536743pt"/>
    </style:style>
    <style:style style:name="MT5" style:family="text">
      <style:text-properties fo:font-size="3.20000004768372pt" style:font-size-asian="3.20000004768372pt" style:font-size-complex="3.20000004768372pt"/>
    </style:style>
    <style:style style:name="MT6" style:family="text">
      <style:text-properties fo:font-size="1pt" style:font-size-asian="1pt" style:font-size-complex="1pt"/>
    </style:style>
    <style:style style:name="MT7" style:family="text">
      <style:text-properties style:font-name="나눔고딕 ExtraBold" fo:font-size="40pt" style:font-name-asian="나눔고딕 ExtraBold" style:font-size-asian="40pt" style:font-size-complex="40pt"/>
    </style:style>
    <style:style style:name="MT8" style:family="text">
      <style:text-properties style:font-name="나눔고딕 ExtraBold" fo:font-size="34pt" style:font-name-asian="나눔고딕 ExtraBold" style:font-size-asian="34pt" style:font-size-complex="34pt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okieRun Bold2" fo:font-size="44pt" fo:letter-spacing="normal" fo:font-style="normal" style:text-underline-style="none" fo:font-weight="normal" fo:background-color="transparent" style:font-name-asian="CookieRun Bold2" style:font-size-asian="44pt" style:language-asian="ko" style:country-asian="KR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28pt" fo:letter-spacing="normal" fo:font-style="normal" style:text-underline-style="none" fo:font-weight="normal" fo:background-color="transparent" style:font-name-asian="맑은 고딕" style:font-size-asian="28pt" style:language-asian="ko" style:country-asian="KR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24pt" fo:letter-spacing="normal" fo:font-style="normal" style:text-underline-style="none" fo:font-weight="normal" fo:background-color="transparent" style:font-name-asian="맑은 고딕" style:font-size-asian="24pt" style:language-asian="ko" style:country-asian="KR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20pt" fo:letter-spacing="normal" fo:font-style="normal" style:text-underline-style="none" fo:font-weight="normal" fo:background-color="transparent" style:font-name-asian="맑은 고딕" style:font-size-asian="20pt" style:language-asian="ko" style:country-asian="KR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name-asian="맑은 고딕" style:font-size-asian="18pt" style:language-asian="ko" style:country-asian="KR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맑은 고딕" fo:font-size="12pt" fo:letter-spacing="normal" fo:font-style="normal" style:text-underline-style="none" fo:font-weight="normal" fo:background-color="transparent" style:font-name-asian="맑은 고딕" style:font-size-asian="12pt" style:language-asian="ko" style:country-asian="KR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▪">
        <style:list-level-properties text:space-before="0.3cm" text:min-label-width="0.75cm"/>
        <style:text-properties fo:font-family="OpenSymbol" style:font-charset="x-symbol" style:use-window-font-color="true" fo:font-size="100%"/>
      </text:list-level-style-bullet>
      <text:list-level-style-bullet text:level="2" text:bullet-char="–">
        <style:list-level-properties text:space-before="1.2cm" text:min-label-width="0.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cm" text:min-label-width="0.6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msk_5f_기본값" style:display-name="msk_기본값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sk_5f_기본값-title" draw:layer="backgroundobjects" svg:width="25.199cm" svg:height="2.629cm" svg:x="1.4cm" svg:y="0.628cm" presentation:class="title" presentation:placeholder="true">
        <draw:text-box/>
      </draw:frame>
      <draw:frame presentation:style-name="Mpr4" draw:layer="backgroundobjects" svg:width="25.199cm" svg:height="10.815cm" svg:x="1.4cm" svg:y="3.685cm" presentation:class="outline">
        <draw:text-box>
          <text:list text:style-name="ML3">
            <text:list-item>
              <text:p>개요 텍스트의 서식을 편집하려면 클릭하십시오</text:p>
              <text:list>
                <text:list-item>
                  <text:p>2번째 개요 수준</text:p>
                  <text:list>
                    <text:list-item>
                      <text:p>3번째 개요 수준</text:p>
                      <text:list>
                        <text:list-item>
                          <text:p>4번째 개요 수준</text:p>
                          <text:list>
                            <text:list-item>
                              <text:p>5번째 개요 수준</text:p>
                              <text:list>
                                <text:list-item>
                                  <text:p>6번째 개요 수준</text:p>
                                  <text:list>
                                    <text:list-item>
                                      <text:p>7번째 개요 수준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msk_5f_기본값-title" draw:layer="backgroundobjects" svg:width="19.798cm" svg:height="11.136cm" svg:x="0.6cm" svg:y="2.257cm" presentation:class="page"/>
        <draw:frame presentation:style-name="msk_5f_기본값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단락_20_제목" style:display-name="단락 제목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5" draw:text-style-name="MP7" draw:layer="backgroundobjects" svg:width="6cm" svg:height="0.75cm" svg:x="0cm" svg:y="16cm" presentation:class="outline">
        <draw:text-box>
          <text:list text:style-name="ML4">
            <text:list-item>
              <text:p><text:span text:style-name="MT2">개요 텍스트의 서식을 편집하려면 클릭하십시오</text:span></text:p>
              <text:list>
                <text:list-item>
                  <text:p><text:span text:style-name="MT3">2</text:span><text:span text:style-name="MT3">번째 개요 수준</text:span></text:p>
                  <text:list>
                    <text:list-item>
                      <text:p><text:span text:style-name="MT4">3</text:span><text:span text:style-name="MT4">번째 개요 수준</text:span></text:p>
                      <text:list>
                        <text:list-item>
                          <text:p><text:span text:style-name="MT5">4</text:span><text:span text:style-name="MT5">번째 개요 수준</text:span></text:p>
                          <text:list>
                            <text:list-item>
                              <text:p><text:span text:style-name="MT5">5</text:span><text:span text:style-name="MT5">번째 개요 수준</text:span></text:p>
                              <text:list>
                                <text:list-item>
                                  <text:p><text:span text:style-name="MT6">6</text:span><text:span text:style-name="MT6">번째 개요 수준</text:span></text:p>
                                  <text:list>
                                    <text:list-item>
                                      <text:p><text:span text:style-name="MT5">7</text:span><text:span text:style-name="MT5">번째 개요 수준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7.999cm" svg:height="15.751cm" svg:x="0cm" svg:y="0cm">
        <draw:image xlink:href="Pictures/100000000000078000000438612C5FC6.png" xlink:type="simple" xlink:show="embed" xlink:actuate="onLoad" draw:mime-type="image/png">
          <text:p/>
        </draw:image>
      </draw:frame>
      <draw:frame presentation:style-name="Mpr6" draw:layer="backgroundobjects" svg:width="25.199cm" svg:height="2.629cm" svg:x="1.4cm" svg:y="7.728cm" presentation:class="title">
        <draw:text-box>
          <text:p>제목 텍스트의 서식을 편집하려면 클릭하십시오.</text:p>
        </draw:text-box>
      </draw:frame>
      <draw:frame draw:style-name="Mgr4" draw:text-style-name="MP10" draw:layer="backgroundobjects" svg:width="28cm" svg:height="2cm" svg:x="0cm" svg:y="5.5cm">
        <draw:text-box>
          <text:p text:style-name="MP9"><text:span text:style-name="MT7">파이썬 활용</text:span></text:p>
        </draw:text-box>
      </draw:frame>
      <presentation:notes style:page-layout-name="PM0">
        <office:forms form:automatic-focus="false" form:apply-design-mode="false"/>
        <draw:page-thumbnail presentation:style-name="단락_20_제목-title" draw:layer="backgroundobjects" svg:width="19.798cm" svg:height="11.136cm" svg:x="0.6cm" svg:y="2.257cm" presentation:class="page"/>
        <draw:frame presentation:style-name="단락_20_제목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_31__5f_단락_20_제목" style:display-name="1_단락 제목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9" draw:text-style-name="MP7" draw:layer="backgroundobjects" svg:width="6cm" svg:height="0.75cm" svg:x="0cm" svg:y="16cm" presentation:class="outline">
        <draw:text-box>
          <text:list text:style-name="ML4">
            <text:list-item>
              <text:p><text:span text:style-name="MT2">개요 텍스트의 서식을 편집하려면 클릭하십시오</text:span></text:p>
              <text:list>
                <text:list-item>
                  <text:p><text:span text:style-name="MT3">2</text:span><text:span text:style-name="MT3">번째 개요 수준</text:span></text:p>
                  <text:list>
                    <text:list-item>
                      <text:p><text:span text:style-name="MT4">3</text:span><text:span text:style-name="MT4">번째 개요 수준</text:span></text:p>
                      <text:list>
                        <text:list-item>
                          <text:p><text:span text:style-name="MT5">4</text:span><text:span text:style-name="MT5">번째 개요 수준</text:span></text:p>
                          <text:list>
                            <text:list-item>
                              <text:p><text:span text:style-name="MT5">5</text:span><text:span text:style-name="MT5">번째 개요 수준</text:span></text:p>
                              <text:list>
                                <text:list-item>
                                  <text:p><text:span text:style-name="MT6">6</text:span><text:span text:style-name="MT6">번째 개요 수준</text:span></text:p>
                                  <text:list>
                                    <text:list-item>
                                      <text:p><text:span text:style-name="MT5">7</text:span><text:span text:style-name="MT5">번째 개요 수준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7.999cm" svg:height="15.751cm" svg:x="0cm" svg:y="0cm">
        <draw:image xlink:href="Pictures/100000000000078000000438612C5FC6.png" xlink:type="simple" xlink:show="embed" xlink:actuate="onLoad" draw:mime-type="image/png">
          <text:p/>
        </draw:image>
      </draw:frame>
      <draw:frame presentation:style-name="Mpr10" draw:layer="backgroundobjects" svg:width="25.199cm" svg:height="2.629cm" svg:x="1.4cm" svg:y="7.728cm" presentation:class="title">
        <draw:text-box>
          <text:p>제목 텍스트의 서식을 편집하려면 클릭하십시오.</text:p>
        </draw:text-box>
      </draw:frame>
      <draw:frame draw:style-name="Mgr4" draw:text-style-name="MP11" draw:layer="backgroundobjects" svg:width="28cm" svg:height="2cm" svg:x="0cm" svg:y="5.5cm">
        <draw:text-box>
          <text:p text:style-name="MP9"><text:span text:style-name="MT8">AI </text:span><text:span text:style-name="MT8">이해 및 활용</text:span></text:p>
        </draw:text-box>
      </draw:frame>
      <presentation:notes style:page-layout-name="PM0">
        <office:forms form:automatic-focus="false" form:apply-design-mode="false"/>
        <draw:page-thumbnail presentation:style-name="_31__5f_단락_20_제목-title" draw:layer="backgroundobjects" svg:width="19.798cm" svg:height="11.136cm" svg:x="0.6cm" svg:y="2.257cm" presentation:class="page"/>
        <draw:frame presentation:style-name="_31__5f_단락_20_제목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제목_20_및_20_내용" style:display-name="제목 및 내용" style:page-layout-name="PM1" draw:style-name="Mdp2">
      <office:forms form:automatic-focus="false" form:apply-design-mode="false"/>
      <loext:theme loext:name="Office 테마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제목 1" presentation:style-name="Mpr13" draw:text-style-name="MP13" draw:layer="backgroundobjects" svg:width="24.149cm" svg:height="3.043cm" svg:x="1.924cm" svg:y="0.838cm" presentation:class="title" presentation:user-transformed="true">
        <draw:text-box>
          <text:p text:style-name="MP12"><text:span text:style-name="MT9">마스터 제목 스타일 편집</text:span></text:p>
        </draw:text-box>
      </draw:frame>
      <draw:frame draw:name="내용 개체 틀 2" presentation:style-name="Mpr14" draw:text-style-name="MP16" draw:layer="backgroundobjects" svg:width="24.149cm" svg:height="9.992cm" svg:x="1.924cm" svg:y="4.192cm" presentation:class="outline" presentation:user-transformed="true">
        <draw:text-box>
          <text:list text:style-name="ML5">
            <text:list-item>
              <text:p text:style-name="MP14"><text:span text:style-name="MT10">마스터 텍스트 스타일 편집</text:span></text:p>
              <text:list>
                <text:list-item>
                  <text:p text:style-name="MP15"><text:span text:style-name="MT11">둘째 수준</text:span></text:p>
                  <text:list>
                    <text:list-item>
                      <text:p text:style-name="MP15"><text:span text:style-name="MT12">셋째 수준</text:span></text:p>
                      <text:list>
                        <text:list-item>
                          <text:p text:style-name="MP15"><text:span text:style-name="MT13">넷째 수준</text:span></text:p>
                          <text:list>
                            <text:list-item>
                              <text:p text:style-name="MP15"><text:span text:style-name="MT13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5" draw:text-style-name="MP18" draw:layer="backgroundobjects" svg:width="6.299cm" svg:height="0.838cm" svg:x="1.924cm" svg:y="14.598cm" presentation:class="date-time" presentation:user-transformed="true">
        <draw:text-box>
          <text:p text:style-name="MP17"><text:span text:style-name="MT14"><presentation:date-time/></text:span></text:p>
        </draw:text-box>
      </draw:frame>
      <draw:frame draw:name="바닥글 개체 틀 4" presentation:style-name="Mpr15" draw:text-style-name="MP18" draw:layer="backgroundobjects" svg:width="9.449cm" svg:height="0.838cm" svg:x="9.273cm" svg:y="14.598cm" presentation:class="footer" presentation:user-transformed="true">
        <draw:text-box>
          <text:p text:style-name="MP19"><text:span text:style-name="MT1"><presentation:footer/></text:span></text:p>
        </draw:text-box>
      </draw:frame>
      <draw:frame draw:name="슬라이드 번호 개체 틀 5" presentation:style-name="Mpr15" draw:text-style-name="MP18" draw:layer="backgroundobjects" svg:width="6.299cm" svg:height="0.838cm" svg:x="19.774cm" svg:y="14.598cm" presentation:class="page-number" presentation:user-transformed="true">
        <draw:text-box>
          <text:p text:style-name="MP20"><text:span text:style-name="MT14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제목_20_및_20_내용-title" draw:layer="backgroundobjects" svg:width="0.001cm" svg:height="0.001cm" svg:x="0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3T09:53:59.842751600</meta:creation-date>
    <meta:generator>LibreOffice/25.8.7.3$Windows_X86_64 LibreOffice_project/30742500f2d3eb4366ac312fa33d3dcabdb3eba5</meta:generator>
    <dc:date>2026-06-19T18:12:58.811715600</dc:date>
    <meta:editing-duration>P2DT5H44M24S</meta:editing-duration>
    <meta:editing-cycles>242</meta:editing-cycles>
    <meta:document-statistic meta:object-count="249"/>
  </office:meta>
</office:document-meta>
</file>